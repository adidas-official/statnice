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language="zxx" fo:country="none" style:language-asian="zxx" style:country-asian="none" style:language-complex="zxx" style:country-complex="none"/>
    </style:style>
    <style:style style:name="P2" style:family="paragraph" style:parent-style-name="Heading_20_2">
      <style:text-properties fo:language="zxx" fo:country="none" style:language-asian="zxx" style:country-asian="none" style:language-complex="zxx" style:country-complex="none"/>
    </style:style>
    <style:style style:name="P3" style:family="paragraph" style:parent-style-name="Standard" style:list-style-name="L2">
      <style:text-properties fo:language="zxx" fo:country="none" officeooo:rsid="001c375d" officeooo:paragraph-rsid="001c375d" style:language-asian="zxx" style:country-asian="none" style:language-complex="zxx" style:country-complex="none"/>
    </style:style>
    <style:style style:name="P4" style:family="paragraph" style:parent-style-name="Standard" style:list-style-name="L2">
      <style:text-properties fo:language="zxx" fo:country="none" officeooo:rsid="001dad1f" officeooo:paragraph-rsid="001dad1f" style:language-asian="zxx" style:country-asian="none" style:language-complex="zxx" style:country-complex="none"/>
    </style:style>
    <style:style style:name="P5" style:family="paragraph" style:parent-style-name="Standard">
      <style:text-properties fo:language="zxx" fo:country="none" officeooo:rsid="001e07df" officeooo:paragraph-rsid="001e07df" style:language-asian="zxx" style:country-asian="none" style:language-complex="zxx" style:country-complex="none"/>
    </style:style>
    <style:style style:name="P6" style:family="paragraph" style:parent-style-name="Standard">
      <style:text-properties fo:language="zxx" fo:country="none" officeooo:rsid="001e2ada" officeooo:paragraph-rsid="001e2ada" style:language-asian="zxx" style:country-asian="none" style:language-complex="zxx" style:country-complex="none"/>
    </style:style>
    <style:style style:name="P7" style:family="paragraph" style:parent-style-name="Standard">
      <style:text-properties fo:language="zxx" fo:country="none" officeooo:rsid="001ff5df" officeooo:paragraph-rsid="001ff5df" style:language-asian="zxx" style:country-asian="none" style:language-complex="zxx" style:country-complex="none"/>
    </style:style>
    <style:style style:name="P8" style:family="paragraph" style:parent-style-name="Standard" style:list-style-name="L1">
      <style:text-properties fo:language="zxx" fo:country="none" officeooo:rsid="001ff5df" officeooo:paragraph-rsid="001ff5df" style:language-asian="zxx" style:country-asian="none" style:language-complex="zxx" style:country-complex="none"/>
    </style:style>
    <style:style style:name="P9" style:family="paragraph" style:parent-style-name="Standard">
      <style:text-properties fo:language="zxx" fo:country="none" officeooo:rsid="00204974" officeooo:paragraph-rsid="00204974" style:language-asian="zxx" style:country-asian="none" style:language-complex="zxx" style:country-complex="none"/>
    </style:style>
    <style:style style:name="P10" style:family="paragraph" style:parent-style-name="Standard">
      <style:text-properties fo:language="zxx" fo:country="none" officeooo:rsid="0020d5e2" officeooo:paragraph-rsid="0020d5e2" style:language-asian="zxx" style:country-asian="none" style:language-complex="zxx" style:country-complex="none"/>
    </style:style>
    <style:style style:name="P11" style:family="paragraph" style:parent-style-name="Standard">
      <style:text-properties fo:language="zxx" fo:country="none" officeooo:rsid="00209c07" officeooo:paragraph-rsid="00209c07" style:language-asian="zxx" style:country-asian="none" style:language-complex="zxx" style:country-complex="none"/>
    </style:style>
    <style:style style:name="P12" style:family="paragraph" style:parent-style-name="Standard" style:list-style-name="L2">
      <style:text-properties officeooo:paragraph-rsid="001bec53"/>
    </style:style>
    <style:style style:name="P13" style:family="paragraph" style:parent-style-name="Text_20_body">
      <style:text-properties officeooo:rsid="0022753c" officeooo:paragraph-rsid="0022753c"/>
    </style:style>
    <style:style style:name="T1" style:family="text">
      <style:text-properties officeooo:rsid="001ff5df"/>
    </style:style>
    <style:style style:name="T2" style:family="text">
      <style:text-properties officeooo:rsid="00204974"/>
    </style:style>
    <style:style style:name="T3" style:family="text">
      <style:text-properties officeooo:rsid="00209c07"/>
    </style:style>
    <style:style style:name="T4" style:family="text">
      <style:text-properties fo:font-weight="bold" style:font-weight-asian="bold" style:font-weight-complex="bold"/>
    </style:style>
    <style:style style:name="T5" style:family="text">
      <style:text-properties fo:font-weight="bold" officeooo:rsid="00209c07" style:font-weight-asian="bold" style:font-weight-complex="bold"/>
    </style:style>
    <style:style style:name="T6" style:family="text">
      <style:text-properties fo:font-weight="bold" officeooo:rsid="0020d5e2" style:font-weight-asian="bold" style:font-weight-complex="bold"/>
    </style:style>
    <style:style style:name="T7" style:family="text">
      <style:text-properties fo:font-weight="bold" officeooo:rsid="0023a2a5" style:font-weight-asian="bold" style:font-weight-complex="bold"/>
    </style:style>
    <style:style style:name="T8" style:family="text">
      <style:text-properties officeooo:rsid="0020d5e2"/>
    </style:style>
    <style:style style:name="T9" style:family="text">
      <style:text-properties fo:font-weight="normal" style:font-weight-asian="normal" style:font-weight-complex="normal"/>
    </style:style>
    <style:style style:name="T10" style:family="text">
      <style:text-properties fo:font-weight="normal" officeooo:rsid="0020d5e2" style:font-weight-asian="normal" style:font-weight-complex="normal"/>
    </style:style>
    <style:style style:name="T11" style:family="text">
      <style:text-properties fo:language="zxx" fo:country="none" officeooo:rsid="001bec53" style:language-asian="zxx" style:country-asian="none" style:language-complex="zxx" style:country-complex="none"/>
    </style:style>
    <style:style style:name="T12" style:family="text">
      <style:text-properties fo:language="zxx" fo:country="none" fo:font-weight="bold" officeooo:rsid="001bec53" style:language-asian="zxx" style:country-asian="none" style:font-weight-asian="bold" style:language-complex="zxx" style:country-complex="none" style:font-weight-complex="bold"/>
    </style:style>
    <style:style style:name="T13" style:family="text">
      <style:text-properties fo:letter-spacing="normal"/>
    </style:style>
    <style:style style:name="T14" style:family="text">
      <style:text-properties officeooo:rsid="0023a2a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2">
        <text:list-item>
          <text:p text:style-name="P12"><text:span text:style-name="T12">NIS</text:span><text:span text:style-name="T11">: </text:span><text:span text:style-name="T13">protokol původně od Sun Microsystems (známý též jako Yellow Pages) sloužící k centralizované správě uživatelů a konfiguračních souborů v unixových sítích.</text:span></text:p>
        </text:list-item>
        <text:list-item>
          <text:p text:style-name="P3"><text:span text:style-name="T4">NT jadro</text:span>: ádro operačních systémů rodiny Windows NT (od prvních verzí až po Windows 2000, XP, 7 a novější). Ačkoliv má vnitřní architekturu navrženou jako mikrojádro, z důvodu výkonu běží všechny jeho součásti v jednom adresním prostoru, takže se ve výsledku chová jako monolitické jádro</text:p>
        </text:list-item>
        <text:list-item>
          <text:p text:style-name="P3"><text:span text:style-name="T4">NTFS (New Technology File System)</text:span>: Pokročilý souborový systém od <text:span text:style-name="T4">Microsoftu</text:span> určený pro řadu <text:span text:style-name="T4">Windows NT a novější</text:span>. Z hlediska bezpečnosti jde o nejlepší systém z probíraných možností, celý funguje v podstatě jako <text:span text:style-name="T4">obří databáze</text:span>, kde každý soubor má svůj záznam v tzv. <text:span text:style-name="T4">Master File Table</text:span> (MFT). Podporuje <text:span text:style-name="T4">přístupová práva </text:span>(ACL), <text:span text:style-name="T4">žurnálování</text:span> (proti výpadkům), <text:span text:style-name="T4">šifrování</text:span> (EFS), diskové <text:span text:style-name="T4">kvóty</text:span>, <text:span text:style-name="T4">dlouhá jména souborů</text:span> i pevnou a symbolickou linku</text:p>
        </text:list-item>
        <text:list-item>
          <text:p text:style-name="P3"><text:span text:style-name="T4">FAT (File Allocation Table</text:span><text:span text:style-name="T7">)</text:span><text:span text:style-name="T14">: Jednodušší a starší souborový systém využívaný například ve </text:span><text:span text:style-name="T7">Windows 95 nebo 98</text:span>. Ve verzích <text:span text:style-name="T4">VFAT</text:span> a <text:span text:style-name="T4">FAT32 </text:span>přinesl podporu dlouhých jmen (až 255 znaků) a <text:span text:style-name="T4">32bitové adresování </text:span>umožňující pracovat s disky <text:span text:style-name="T4">do</text:span> kapacity <text:span text:style-name="T4">2 TB</text:span>. Oproti NTFS nemá téměř <text:span text:style-name="T4">žádné zabezpečení </text:span>(využívá pouze základní atributy jako čtení, skrytý, systémový, archivní), ale jeho výhodou je velká <text:span text:style-name="T4">jednoduchost</text:span> a <text:span text:style-name="T4">snadnější obnova</text:span> smazaných souborů</text:p>
        </text:list-item>
        <text:list-item>
          <text:p text:style-name="P4"><text:span text:style-name="T4">ARM:</text:span> architektura <text:span text:style-name="T4">RISCových procesorů</text:span> hojně využívaná v <text:span text:style-name="T4">mobilních telefonech</text:span> a vestavěných zařízeních.</text:p>
        </text:list-item>
        <text:list-item>
          <text:p text:style-name="P4"><text:span text:style-name="T4">Handle Keys:</text:span> Jde o číselný či řetězcový <text:span text:style-name="T4">odkaz</text:span>, který proces získá od operačního systému při <text:span text:style-name="T4">otevření určitého prostředku </text:span>(např. souboru nebo sdílené paměti), aby přes něj s tímto prostředkem <text:span text:style-name="T4">mohl </text:span>dále <text:span text:style-name="T4">pracovat</text:span></text:p>
        </text:list-item>
        <text:list-item>
          <text:p text:style-name="P4"><text:span text:style-name="T4">DWORD:</text:span> "Double Word" (dvojité slovo). Jedná se o <text:span text:style-name="T4">standardní datový typ</text:span> používaný v programování (typicky pro <text:span text:style-name="T4">Windows API</text:span>), který reprezentuje <text:span text:style-name="T4">32bitové</text:span> celé <text:span text:style-name="T4">číslo bez znaménka</text:span>.</text:p>
        </text:list-item>
        <text:list-item>
          <text:p text:style-name="P4"><text:span text:style-name="T4">BCD </text:span><text:span text:style-name="T7">(Boot Configuration Data)</text:span>: <text:span text:style-name="T4">databáze</text:span>, kterou novější verze <text:span text:style-name="T4">Windows </text:span>používají k uložení <text:span text:style-name="T4">konfigurace při zavádění systému </text:span></text:p>
          <text:p text:style-name="P4"/>
        </text:list-item>
      </text:list>
      <text:h text:style-name="P2" text:outline-level="2">Operacni system</text:h>
      <text:p text:style-name="P5">Je to softwarovy spravce systemovych prostredku. Prideluje prostredky komponentu jako procesor, pamet, vnejsi pametove disky nebo periferie vsem programum. Operacni system rozdeluje, ktery program bude mit kdy na pozadani kolik zdroju, kolik toho muze vyuzit.</text:p>
      <text:p text:style-name="P5"/>
      <text:h text:style-name="P2" text:outline-level="2">I-node</text:h>
      <text:p text:style-name="P6">Zakladni prvek souborovych systemu UNIX</text:p>
      <text:p text:style-name="P6"/>
      <text:h text:style-name="P2" text:outline-level="2">MFT (Master File Table)</text:h>
      <text:p text:style-name="P6">Systemovy soubor NTFS souboroveho systemu ve Windows. Je to velka databaze obsahujici metadata o vsech souborech na disku – fyzicke umisteni na disku, velikost nebo typ souboru, hlavicky s udaji o zaznamu.</text:p>
      <text:p text:style-name="P6"/>
      <text:h text:style-name="P2" text:outline-level="2"><text:soft-page-break/>Rozdil mezi vlakny a procesy</text:h>
      <text:p text:style-name="P6">Vlakna sdileji adresovy prostor v ramci jednoho procesu, procesy jsou izolovane. Kazdy proces ma vyhrazeny svuj vlastni virtualni pocitac po dobu behu procesu. Tim je proces izolovany od ostatnich procesu a vytvari iluzi, ze jiny proces proste neni. Procesy o sobe vzajemne nevi. Vlakna bezi paralelne v ramci jednoho procesu. <text:span text:style-name="T1">Vlakna maji vlastni citac, zasobnik, urcuji aktualni instrukci, ale sdileji spolecny kod a datovy region a otevrene soubory.</text:span></text:p>
      <text:p text:style-name="P7">Priklady vicevlaknovych procesu:</text:p>
      <text:list text:style-name="L1">
        <text:list-item>
          <text:p text:style-name="P8">Webovy prohlizec: Jedno vlakno prijima vstup od uzivatele, druhe vykresluje na obrazovce elementy webovych stranek, treti stahuje obrazky a posila data</text:p>
        </text:list-item>
        <text:list-item>
          <text:p text:style-name="P8">Textovy procesor</text:p>
        </text:list-item>
        <text:list-item>
          <text:p text:style-name="P8">Graficky editor</text:p>
        </text:list-item>
      </text:list>
      <text:p text:style-name="P7">Smyslem vlaken je, aby na spolecnem ukolu (procesu) pracovalo vice zdroju soucasne. </text:p>
      <text:p text:style-name="P7"/>
      <text:h text:style-name="P2" text:outline-level="2">Semafor <text:span text:style-name="T8">vs Binarni semafor vs </text:span><text:span text:style-name="T2">Mutex</text:span></text:h>
      <text:p text:style-name="P9">Pomaha<text:span text:style-name="T8">ji</text:span> predchazet <text:span text:style-name="T4">Race conditions</text:span><text:span text:style-name="T9">, </text:span><text:span text:style-name="T10">ale kazdy trochu jinak.</text:span></text:p>
      <text:p text:style-name="P9"><text:span text:style-name="T4">Mutex</text:span> (<text:span text:style-name="T4">MUT</text:span>ual <text:span text:style-name="T4">E</text:span><text:span text:style-name="T5">X</text:span>clusion)</text:p>
      <text:p text:style-name="P9">Jen jedno vlakno muze pristoupit ke kritickemu zdroji. Mutex zablokuje zdroj pro ostatni vsechny ostatni, dokud vlakno nedokonci praci. <text:span text:style-name="T8">Odemknout ho muze pouze proces, ktery ho aktualne drzi.</text:span></text:p>
      <text:p text:style-name="P10"><text:span text:style-name="T4">Binarni semafor</text:span> je hodne podobny mutexu (jen jedno vlakno), ale zdroj muze odemknout i jiny proces.</text:p>
      <text:p text:style-name="P9"><text:span text:style-name="T6">Obecny </text:span><text:span text:style-name="T4">Semafor </text:span>umoznuje, aby se stejnou kritickou sekci pracovalo vice vlaken. Pocet je omezeny, programator zvoli, kolik vlaken muze mit pristup. Kdyz se misto uvolni, cekajici vlakno muze zacit pracovat. Stav mist se prepina <text:span text:style-name="T3">na zelenou (volno) a cervenou (cekej).</text:span></text:p>
      <text:p text:style-name="P11"/>
      <text:h text:style-name="P1" text:outline-level="3">Priklad v pythonu:</text:h>
      <text:p text:style-name="P11">``````````````````````````````````````````````</text:p>
      <text:p text:style-name="P11">` import threading<text:tab/><text:tab/><text:tab/>`</text:p>
      <text:p text:style-name="P11">` sem = threading.Semapthore(3)<text:tab/>`</text:p>
      <text:p text:style-name="P11">` def access_resource():<text:tab/><text:tab/>`</text:p>
      <text:p text:style-name="P11">` <text:tab/>with sem:<text:tab/><text:tab/><text:tab/>`</text:p>
      <text:p text:style-name="P11">`<text:tab/><text:tab/># do something<text:tab/>`</text:p>
      <text:p text:style-name="P9"><text:span text:style-name="T3">``````````````````````````````````````````````</text:span></text:p>
      <text:h text:style-name="Heading_20_2" text:outline-level="2">Strankovani</text:h>
      <text:p text:style-name="P13">Problem s primym pristupem k pameti.</text:p>
      <text:p text:style-name="P13">Bezpecnost</text:p>
      <text:p text:style-name="P13">Fragmentace</text:p>
      <text:p text:style-name="P13">Nedostatecna pam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4T21:11:39.461115915</meta:creation-date>
    <dc:date>2026-05-14T23:54:33.378913667</dc:date>
    <meta:editing-duration>PT28M39S</meta:editing-duration>
    <meta:editing-cycles>2</meta:editing-cycles>
    <meta:generator>LibreOffice/24.2.7.2$Linux_X86_64 LibreOffice_project/420$Build-2</meta:generator>
    <meta:document-statistic meta:table-count="0" meta:image-count="0" meta:object-count="0" meta:page-count="2" meta:paragraph-count="41" meta:word-count="624" meta:character-count="4251" meta:non-whitespace-character-count="3669"/>
  </office:meta>
</office:document-meta>
</file>