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B000002B86E1D4555.png" manifest:media-type="image/png"/>
  <manifest:file-entry manifest:full-path="Pictures/100000010000077A00000413814C2FB0.png" manifest:media-type="image/png"/>
  <manifest:file-entry manifest:full-path="Pictures/100000010000020E000000A497F2126B.png" manifest:media-type="image/png"/>
  <manifest:file-entry manifest:full-path="Pictures/10000001000001ED0000016335E998D0.png" manifest:media-type="image/png"/>
  <manifest:file-entry manifest:full-path="Pictures/100000010000077A00000413C181A0C1.png" manifest:media-type="image/png"/>
  <manifest:file-entry manifest:full-path="Pictures/100000010000045F000002709DD4F052.png" manifest:media-type="image/png"/>
  <manifest:file-entry manifest:full-path="Pictures/10000001000003D8000001808B2AE488.png" manifest:media-type="image/png"/>
  <manifest:file-entry manifest:full-path="Pictures/100000010000039D000000AC9F869EA9.png" manifest:media-type="image/png"/>
  <manifest:file-entry manifest:full-path="Pictures/1000000100000601000003472D15E303.png" manifest:media-type="image/png"/>
  <manifest:file-entry manifest:full-path="Pictures/10000001000003C00000015238A45DDE.png" manifest:media-type="image/png"/>
  <manifest:file-entry manifest:full-path="Pictures/100000010000036700000073E9451863.png" manifest:media-type="image/png"/>
  <manifest:file-entry manifest:full-path="Pictures/100000010000020E000000A4E20B76E0.png" manifest:media-type="image/png"/>
  <manifest:file-entry manifest:full-path="Pictures/10000001000003AE0000027EF5D2FC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261e4" officeooo:paragraph-rsid="000261e4"/>
    </style:style>
    <style:style style:name="P2" style:family="paragraph" style:parent-style-name="Standard">
      <style:text-properties officeooo:rsid="0003407e" officeooo:paragraph-rsid="0003407e"/>
    </style:style>
    <style:style style:name="P3" style:family="paragraph" style:parent-style-name="Standard">
      <style:text-properties officeooo:rsid="0004a25c" officeooo:paragraph-rsid="0004a25c"/>
    </style:style>
    <style:style style:name="P4" style:family="paragraph" style:parent-style-name="Standard">
      <style:text-properties officeooo:paragraph-rsid="0004a25c"/>
    </style:style>
    <style:style style:name="P5" style:family="paragraph" style:parent-style-name="Standard">
      <style:text-properties officeooo:rsid="0004f43a" officeooo:paragraph-rsid="0004f43a"/>
    </style:style>
    <style:style style:name="P6" style:family="paragraph" style:parent-style-name="Standard">
      <style:text-properties officeooo:rsid="000608ca" officeooo:paragraph-rsid="000608ca"/>
    </style:style>
    <style:style style:name="P7" style:family="paragraph" style:parent-style-name="Standard">
      <style:text-properties officeooo:paragraph-rsid="000608ca"/>
    </style:style>
    <style:style style:name="P8" style:family="paragraph" style:parent-style-name="Standard">
      <style:text-properties officeooo:paragraph-rsid="00063b19"/>
    </style:style>
    <style:style style:name="P9" style:family="paragraph" style:parent-style-name="Standard">
      <style:text-properties officeooo:rsid="00063b19" officeooo:paragraph-rsid="00063b19"/>
    </style:style>
    <style:style style:name="T1" style:family="text">
      <style:text-properties officeooo:rsid="0004a25c"/>
    </style:style>
    <style:style style:name="T2" style:family="text">
      <style:text-properties officeooo:rsid="000608ca"/>
    </style:style>
    <style:style style:name="T3" style:family="text">
      <style:text-properties officeooo:rsid="00063b1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1.6957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vytvořte nového uživatele testX</text:p>
      <text:p text:style-name="P1">settings → accounts → family and other users → add someone else to this pc → I don’t have this person’s sign-in information→ add user without a microsoft account</text:p>
      <text:p text:style-name="P1"/>
      <text:p text:style-name="P1">User name: userX</text:p>
      <text:p text:style-name="P1">Password: Password1*</text:p>
      <text:p text:style-name="P1">security questions jakekoliv</text:p>
      <text:p text:style-name="P1"><draw:frame draw:style-name="fr1" draw:name="Image1" text:anchor-type="char" svg:width="6.6929in" svg:height="4.5327in" draw:z-index="0"><draw:image xlink:href="Pictures/10000001000003AE0000027EF5D2FC7D.png" xlink:type="simple" xlink:show="embed" xlink:actuate="onLoad" draw:mime-type="image/png"/></draw:frame>2. Vytvořte dávkový soubor (.bat), který vypíše přivítání konkrétního uživatele, informaci o přihlášeném jméně a bude čekat na zmáčknutí klávesy. Nevkládat spustit při startu, ale spustit uživatelský skript.</text:p>
      <text:p text:style-name="P1"><draw:frame draw:style-name="fr5" draw:name="Image2" text:anchor-type="char" svg:x="0.0311in" svg:y="0.0555in" svg:width="6.6929in" svg:height="2.9445in" draw:z-index="1"><draw:image xlink:href="Pictures/1000000100000601000003472D15E303.png" xlink:type="simple" xlink:show="embed" xlink:actuate="onLoad" draw:mime-type="image/png"/></draw:frame></text:p>
      <text:p text:style-name="P2">Win+R → shell:startup a vlozit soubor script.bat do otevrene slozky</text:p>
      <text:p text:style-name="P2">C:\Users\bluem\AppData\Roaming\Microsoft\Windows\Start Menu\Programs\Startup</text:p>
      <text:p text:style-name="P2"><text:soft-page-break/>3. Nastavte politiku - například utilitou secpol.msc, aby heslo uživatelů vypršelo za 20 dní</text:p>
      <text:p text:style-name="P2"><draw:frame draw:style-name="fr1" draw:name="Image3" text:anchor-type="char" svg:width="6.6929in" svg:height="2.6118in" draw:z-index="2"><draw:image xlink:href="Pictures/10000001000003D8000001808B2AE488.png" xlink:type="simple" xlink:show="embed" xlink:actuate="onLoad" draw:mime-type="image/png"/></draw:frame><text:s/></text:p>
      <text:p text:style-name="P2">v cmd (jako spravce) `net account maxpwage:20`.</text:p>
      <text:p text:style-name="P2"/>
      <text:p text:style-name="P2">4. Vytvořte adresář pokus a nastavte, aby do něj mohl zapisovat jen uživatel testX. Toto nastavte pomocí NTFS práv.</text:p>
      <text:p text:style-name="P2"/>
      <text:p text:style-name="P2">V cmd `mkdir C:\Users\<text:span text:style-name="T1">testX</text:span>\pokus` - vytvoreni slozky s nazvem pokus</text:p>
      <text:p text:style-name="P3">Uzivatel testX je prihlaseny a vytvoril slozku pokus, ma k ni tedy uz full controll. </text:p>
      <text:p text:style-name="P3">Jinak se nastavil pomoci &lt;Right Click&gt; na slozku pokus → properties → security → advanced</text:p>
      <text:p text:style-name="P3">disable inheritance a add. Select principal vybrat testX a naklikat hlavne WRITE</text:p>
      <text:p text:style-name="P3"><draw:frame draw:style-name="fr4" draw:name="Image5" text:anchor-type="char" svg:width="5.1354in" svg:height="3.698in" draw:z-index="4"><draw:image xlink:href="Pictures/10000001000001ED0000016335E998D0.png" xlink:type="simple" xlink:show="embed" xlink:actuate="onLoad" draw:mime-type="image/png"/></draw:frame></text:p>
      <text:p text:style-name="P3"><draw:frame draw:style-name="fr3" draw:name="Image4" text:anchor-type="char" svg:width="6.6929in" svg:height="3.7319in" draw:z-index="3"><draw:image xlink:href="Pictures/100000010000045F000002709DD4F052.png" xlink:type="simple" xlink:show="embed" xlink:actuate="onLoad" draw:mime-type="image/png"/></draw:frame><text:soft-page-break/>5. Vytvořte novou skupinu studenti a přidejte uživatele testX do této skupiny.</text:p>
      <text:p text:style-name="P4"><text:span text:style-name="T1">Pozn.: Mam verzi win10 home eddition, tady neni graficke rozhrani </text:span>lusrmgr.msc, <text:span text:style-name="T1">proto v cmd</text:span></text:p>
      <text:p text:style-name="P5"><draw:frame draw:style-name="fr4" draw:name="Image6" text:anchor-type="char" svg:width="5.4791in" svg:height="1.7083in" draw:z-index="5"><draw:image xlink:href="Pictures/100000010000020E000000A497F2126B.png" xlink:type="simple" xlink:show="embed" xlink:actuate="onLoad" draw:mime-type="image/png"/></draw:frame>kontrola</text:p>
      <text:p text:style-name="P5"><draw:frame draw:style-name="fr4" draw:name="Image7" text:anchor-type="char" svg:width="5.4791in" svg:height="1.7083in" draw:z-index="6"><draw:image xlink:href="Pictures/100000010000020E000000A4E20B76E0.png" xlink:type="simple" xlink:show="embed" xlink:actuate="onLoad" draw:mime-type="image/png"/></draw:frame>6. Nastaveni auditu pro sledovani prihlaseni uzivatelu v cmd:</text:p>
      <text:p text:style-name="P5"><draw:frame draw:style-name="fr1" draw:name="Image8" text:anchor-type="char" svg:width="6.6929in" svg:height="0.8835in" draw:z-index="7"><draw:image xlink:href="Pictures/100000010000036700000073E9451863.png" xlink:type="simple" xlink:show="embed" xlink:actuate="onLoad" draw:mime-type="image/png"/></draw:frame><text:line-break/>po odhlaseni a prihlaseni v eventviewer utilite event ID 4624 je uspesne prihlaseni (4625 by bylo neuspesne)</text:p>
      <text:p text:style-name="P5"><draw:frame draw:style-name="fr3" draw:name="Image9" text:anchor-type="char" svg:width="6.6929in" svg:height="3.6472in" draw:z-index="8"><draw:image xlink:href="Pictures/100000010000077A00000413814C2FB0.png" xlink:type="simple" xlink:show="embed" xlink:actuate="onLoad" draw:mime-type="image/png"/></draw:frame><text:soft-page-break/>7. Podívejte se na prohlížeč událostí, kdo se kdy přihlásil.</text:p>
      <text:p text:style-name="P5">Viz. 6 – Event Viewer → windows logs → security → <text:span text:style-name="T2">ID 4624 → general:</text:span></text:p>
      <text:p text:style-name="P5"><draw:frame draw:style-name="fr1" draw:name="Image10" text:anchor-type="char" svg:width="6.6929in" svg:height="3.6472in" draw:z-index="9"><draw:image xlink:href="Pictures/100000010000077A00000413C181A0C1.png" xlink:type="simple" xlink:show="embed" xlink:actuate="onLoad" draw:mime-type="image/png"/></draw:frame><text:line-break/><text:span text:style-name="T2">Sekce “New Logon” zobrazuje informace o prihlasenem uzivateli. ID, domena, SID,…</text:span></text:p>
      <text:p text:style-name="P6">Prihlasil se SYSTEM, tzn.: uzivatel s admin opravnenim</text:p>
      <text:p text:style-name="P6"/>
      <text:p text:style-name="P6">8. Zálohujte celý registr do textového souboru.</text:p>
      <text:p text:style-name="P6"><draw:frame draw:style-name="fr2" draw:name="Image11" text:anchor-type="char" svg:x="0.0937in" svg:y="0.1102in" svg:width="6.6929in" svg:height="1.2445in" draw:z-index="10"><draw:image xlink:href="Pictures/100000010000039D000000AC9F869EA9.png" xlink:type="simple" xlink:show="embed" xlink:actuate="onLoad" draw:mime-type="image/png"/></draw:frame><text:line-break/><text:line-break/></text:p>
      <text:p text:style-name="P6"/>
      <text:p text:style-name="P7"><text:soft-page-break/><text:span text:style-name="T2">v cmd jako admin: `reg export HKCU C:\register_backup.reg` vytvori export registeru do souboru C:\register_backup.reg</text:span></text:p>
      <text:p text:style-name="P7"/>
      <text:p text:style-name="P6">9.</text:p>
      <text:p text:style-name="P6">v cmd jako spravce:</text:p>
      <text:p text:style-name="P6">`net user /add [username]` - kde [username] je jmeno uzivatele. Pripadne jeste [password] pro nastaveni hesla</text:p>
      <text:p text:style-name="P8"><draw:frame draw:style-name="fr1" draw:name="Image12" text:anchor-type="char" svg:width="6.6929in" svg:height="2.3563in" draw:z-index="11"><draw:image xlink:href="Pictures/10000001000003C00000015238A45DDE.png" xlink:type="simple" xlink:show="embed" xlink:actuate="onLoad" draw:mime-type="image/png"/></draw:frame><text:span text:style-name="T3"><text:line-break/>12. kvota pro uzivatele na 1 GB</text:span></text:p>
      <text:p text:style-name="P9">This computer → &lt;Right click&gt; na C: → properties → quotas → show quota settings → quota entries → do pole napsat jmeno uzivatele, napr “new_user_1” a check names → OK</text:p>
      <text:p text:style-name="P9">v dialogu nastavit limit dist space to 1GB a wanring na treba 900MB a OK</text:p>
      <text:p text:style-name="P9"/>
      <text:p text:style-name="P9">13. zobrazte tabulku arp</text:p>
      <text:p text:style-name="P9">v cmd `arp -a`</text:p>
      <text:p text:style-name="P9"><draw:frame draw:style-name="fr1" draw:name="Image13" text:anchor-type="char" svg:width="6.6929in" svg:height="4.061in" draw:z-index="12"><draw:image xlink:href="Pictures/100000010000047B000002B86E1D4555.png" xlink:type="simple" xlink:show="embed" xlink:actuate="onLoad" draw:mime-type="image/png"/></draw:frame></text:p>
      <text:p text:style-name="P9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20:10:28.136592594</meta:creation-date>
    <dc:date>2026-01-12T21:28:28.937864389</dc:date>
    <meta:editing-duration>PT7M9S</meta:editing-duration>
    <meta:editing-cycles>1</meta:editing-cycles>
    <meta:document-statistic meta:table-count="0" meta:image-count="13" meta:object-count="0" meta:page-count="5" meta:paragraph-count="36" meta:word-count="373" meta:character-count="2399" meta:non-whitespace-character-count="2052"/>
    <meta:generator>LibreOffice/24.2.7.2$Linux_X86_64 LibreOffice_project/420$Build-2</meta:generator>
  </office:meta>
</office:document-meta>
</file>