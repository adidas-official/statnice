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0561" officeooo:paragraph-rsid="000d0561"/>
    </style:style>
    <style:style style:name="P2" style:family="paragraph" style:parent-style-name="Standard" style:list-style-name="L1">
      <style:text-properties officeooo:rsid="000d0561" officeooo:paragraph-rsid="000d0561"/>
    </style:style>
    <style:style style:name="P3" style:family="paragraph" style:parent-style-name="Standard" style:list-style-name="L3">
      <style:text-properties officeooo:rsid="000d0561" officeooo:paragraph-rsid="000d0561"/>
    </style:style>
    <style:style style:name="P4" style:family="paragraph" style:parent-style-name="Standard" style:list-style-name="L4">
      <style:text-properties officeooo:rsid="000d0561" officeooo:paragraph-rsid="000d0561"/>
    </style:style>
    <style:style style:name="P5" style:family="paragraph" style:parent-style-name="Standard" style:list-style-name="L4">
      <style:text-properties officeooo:rsid="000d0561" officeooo:paragraph-rsid="000e5f56"/>
    </style:style>
    <style:style style:name="P6" style:family="paragraph" style:parent-style-name="Standard" style:list-style-name="L5">
      <style:text-properties officeooo:rsid="000d0561" officeooo:paragraph-rsid="000d0561"/>
    </style:style>
    <style:style style:name="P7" style:family="paragraph" style:parent-style-name="Standard" style:list-style-name="L4">
      <style:text-properties officeooo:rsid="000e5f56" officeooo:paragraph-rsid="000e5f56"/>
    </style:style>
    <style:style style:name="P8" style:family="paragraph" style:parent-style-name="Standard" style:list-style-name="L5">
      <style:text-properties officeooo:rsid="000fe00d" officeooo:paragraph-rsid="000fe00d"/>
    </style:style>
    <style:style style:name="P9" style:family="paragraph" style:parent-style-name="Standard" style:list-style-name="L4">
      <style:text-properties officeooo:rsid="0011d39c" officeooo:paragraph-rsid="0011d39c"/>
    </style:style>
    <style:style style:name="P10" style:family="paragraph" style:parent-style-name="Standard">
      <style:text-properties officeooo:paragraph-rsid="0013634e"/>
    </style:style>
    <style:style style:name="P11" style:family="paragraph" style:parent-style-name="Standard" style:list-style-name="L7">
      <style:text-properties officeooo:paragraph-rsid="0013634e"/>
    </style:style>
    <style:style style:name="P12" style:family="paragraph" style:parent-style-name="Standard" style:list-style-name="L7">
      <style:text-properties officeooo:rsid="0013634e" officeooo:paragraph-rsid="0013634e"/>
    </style:style>
    <style:style style:name="P13" style:family="paragraph" style:parent-style-name="Standard" style:list-style-name="L4">
      <style:text-properties officeooo:rsid="001468cc" officeooo:paragraph-rsid="001468cc"/>
    </style:style>
    <style:style style:name="P14" style:family="paragraph" style:parent-style-name="Standard" style:list-style-name="L5">
      <style:text-properties officeooo:rsid="001468cc" officeooo:paragraph-rsid="001468cc"/>
    </style:style>
    <style:style style:name="P15" style:family="paragraph" style:parent-style-name="Standard" style:list-style-name="L2">
      <style:text-properties officeooo:rsid="001468cc" officeooo:paragraph-rsid="001468cc"/>
    </style:style>
    <style:style style:name="P16" style:family="paragraph" style:parent-style-name="Standard" style:list-style-name="L9">
      <style:text-properties officeooo:rsid="001468cc" officeooo:paragraph-rsid="001468cc"/>
    </style:style>
    <style:style style:name="P17" style:family="paragraph" style:parent-style-name="Standard" style:list-style-name="L2">
      <style:text-properties officeooo:rsid="00164930" officeooo:paragraph-rsid="00164930"/>
    </style:style>
    <style:style style:name="P18" style:family="paragraph" style:parent-style-name="Standard" style:list-style-name="L10">
      <style:text-properties officeooo:rsid="00164930" officeooo:paragraph-rsid="00164930"/>
    </style:style>
    <style:style style:name="P19" style:family="paragraph" style:parent-style-name="Standard" style:list-style-name="L3">
      <style:text-properties officeooo:rsid="00164930" officeooo:paragraph-rsid="00164930"/>
    </style:style>
    <style:style style:name="T1" style:family="text">
      <style:text-properties officeooo:rsid="000d0561"/>
    </style:style>
    <style:style style:name="T2" style:family="text">
      <style:text-properties officeooo:rsid="000e5f56"/>
    </style:style>
    <style:style style:name="T3" style:family="text">
      <style:text-properties officeooo:rsid="0011d39c"/>
    </style:style>
    <style:style style:name="T4" style:family="text">
      <style:text-properties officeooo:rsid="0013634e"/>
    </style:style>
    <style:style style:name="T5" style:family="text">
      <style:text-properties fo:font-weight="bold" officeooo:rsid="0013634e" style:font-weight-asian="bold" style:font-weight-complex="bold"/>
    </style:style>
    <style:style style:name="T6" style:family="text">
      <style:text-properties fo:font-weight="bold" officeooo:rsid="00164930" style:font-weight-asian="bold" style:font-weight-complex="bold"/>
    </style:style>
    <style:style style:name="T7" style:family="text">
      <style:text-properties officeooo:rsid="001468cc"/>
    </style:style>
    <style:style style:name="T8" style:family="text">
      <style:text-properties officeooo:rsid="001649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kladni pojmy</text:p>
      <text:list text:style-name="L4">
        <text:list-item>
          <text:p text:style-name="P4">co je to mnozina<text:line-break/><text:span text:style-name="T2">Mnozina je </text:span><text:span text:style-name="T5">neusporadany </text:span><text:span text:style-name="T2">soubor prvku, ktere maji spolecne vlastnosti. </text:span><text:span text:style-name="T4">Jsou presne specifikovane a daji se mezi sebou rozlisit.</text:span></text:p>
        </text:list-item>
        <text:list-item>
          <text:p text:style-name="P5">nejcastejsi mnoziny</text:p>
          <text:list>
            <text:list-item>
              <text:p text:style-name="P5"><text:span text:style-name="T2">N – prirozena cisla (1,2,3,4,…) jen kladna cela cisla, bez nuly</text:span></text:p>
            </text:list-item>
            <text:list-item>
              <text:p text:style-name="P7">Z – cela cisla (0, 1, -1, 2, -2, ...)</text:p>
            </text:list-item>
            <text:list-item>
              <text:p text:style-name="P7">Q – Racionalni cisla (zlomky) daji se vyjadrit jako podil dvou celych cisel</text:p>
            </text:list-item>
            <text:list-item>
              <text:p text:style-name="P7">R – Realna cisla (vsechno krome iracionalnich cisel, tzn cisel, ktere nejdou vyjadrit jako podil dvou celych cisel)</text:p>
            </text:list-item>
            <text:list-item>
              <text:p text:style-name="P7">prazdna mnozina – nemaji zadny prvek</text:p>
            </text:list-item>
          </text:list>
        </text:list-item>
        <text:list-item>
          <text:p text:style-name="P7">Zadani mnozin</text:p>
          <text:list>
            <text:list-item>
              <text:p text:style-name="P7">vyctem prvku napr.: {1,2,3,4}</text:p>
            </text:list-item>
            <text:list-item>
              <text:p text:style-name="P7">jejich vlastnostmi, napr.: vsechna suda cisla S={2*n; n nalezi N}</text:p>
            </text:list-item>
          </text:list>
        </text:list-item>
        <text:list-item>
          <text:p text:style-name="P9">Podmnozina</text:p>
          <text:list>
            <text:list-item>
              <text:p text:style-name="P9">Je to mnozina prvku, ktere se vsechny nachazeji v jine, vetsi mnozine. Je jeji casti. Napr.: A = {1,2,3,4,5,6} a podmnozina B = {2,4,5}. Vsechny prvky B jsou v A</text:p>
            </text:list-item>
          </text:list>
        </text:list-item>
        <text:list-item>
          <text:p text:style-name="P13">Potencni mnozina</text:p>
          <text:list>
            <text:list-item>
              <text:p text:style-name="P13">mnozina vsech podmnozin, ktere muze nejaka mnozina obsahovat</text:p>
            </text:list-item>
          </text:list>
        </text:list-item>
        <text:list-item>
          <text:p text:style-name="P9">Universum</text:p>
          <text:list>
            <text:list-item>
              <text:p text:style-name="P9">Mnozina vsech prvku, ktere v danem problemu uvazujeme. Kdyz vybirame jakekoliv dalsi mnoziny, vybirame je pouze z predem daneho universa. <text:span text:style-name="T4">Urcuje to pevne hranice pro to, co prave resime. (studenti na prednasce, kteri hraji fotbal. Universum jsou studenti na prednasce)</text:span></text:p>
              <text:p text:style-name="P7"/>
            </text:list-item>
          </text:list>
        </text:list-item>
      </text:list>
      <text:p text:style-name="P1">operace s mnozinami</text:p>
      <text:list text:style-name="L5">
        <text:list-item>
          <text:p text:style-name="P6">zakladni operace</text:p>
          <text:list>
            <text:list-item>
              <text:p text:style-name="P8">prunik – spolecne prvky dvou mnozin</text:p>
            </text:list-item>
            <text:list-item>
              <text:p text:style-name="P8">sjednoceni – vsechny prvky obou mnozin</text:p>
            </text:list-item>
            <text:list-item>
              <text:p text:style-name="P8">doplnek mnoziny – prvky z mnoziny A, ktere nejsou v mnozine B</text:p>
            </text:list-item>
            <text:list-item>
              <text:p text:style-name="P8">rozdil mnozin – zbydou jen prvky, ktere nejsou v druhe mnozine, odeberou se spolecne prvky</text:p>
            </text:list-item>
          </text:list>
        </text:list-item>
        <text:list-item>
          <text:p text:style-name="P6">kartersky soucin</text:p>
          <text:list>
            <text:list-item>
              <text:p text:style-name="P8">jsou to usporadane dvojce (nebo n-tice) z obou (nebo vice) mnozin</text:p>
            </text:list-item>
            <text:list-item>
              <text:p text:style-name="P8">lze delat na libovolnem poctu mnozin</text:p>
            </text:list-item>
            <text:list-item>
              <text:p text:style-name="P8">s prazdnou mnozinou je to zase jen prazdna mnozina</text:p>
            </text:list-item>
            <text:list-item>
              <text:p text:style-name="P8">zalezi na poradi prvku – <text:span text:style-name="T3">(</text:span>1,2<text:span text:style-name="T3">)</text:span> je jina dvojce nez <text:span text:style-name="T3">(</text:span>2,1<text:span text:style-name="T3">)</text:span></text:p>
            </text:list-item>
            <text:list-item>
              <text:p text:style-name="P8">vytvareni kombinaci prvku z dvou nebo vice mnozin</text:p>
            </text:list-item>
            <text:list-item>
              <text:p text:style-name="P14">vlastnosti</text:p>
              <text:list>
                <text:list-item>
                  <text:p text:style-name="P14">komutativita: A pr B = B pr A a obracene</text:p>
                </text:list-item>
                <text:list-item>
                  <text:p text:style-name="P14">asociativita: A sj (B sj C) = (A sj B) sj C | stejne pro prunik</text:p>
                </text:list-item>
                <text:list-item>
                  <text:p text:style-name="P14">distibtivita</text:p>
                </text:list-item>
                <text:list-item>
                  <text:p text:style-name="P14">zakony jednotky a nuly</text:p>
                </text:list-item>
              </text:list>
            </text:list-item>
          </text:list>
          <text:p text:style-name="P6"/>
        </text:list-item>
      </text:list>
      <text:p text:style-name="P10"><text:span text:style-name="T1">vlastnosti a reseni</text:span></text:p>
      <text:list text:style-name="L7">
        <text:list-item>
          <text:p text:style-name="P11"><text:span text:style-name="T4">vlastnosti </text:span><text:span text:style-name="T7">mnozin</text:span></text:p>
          <text:list>
            <text:list-item>
              <text:p text:style-name="P12">kazdy prvek je unikatni</text:p>
            </text:list-item>
            <text:list-item>
              <text:p text:style-name="P12">je jen jedna prazdna mnozina</text:p>
            </text:list-item>
          </text:list>
        </text:list-item>
      </text:list>
      <text:list text:style-name="L1">
        <text:list-item>
          <text:p text:style-name="P2">algebraicke vlastnosti</text:p>
          <text:list>
            <text:list-item>
              <text:p text:style-name="P2"/>
            </text:list-item>
          </text:list>
        </text:list-item>
        <text:list-item>
          <text:p text:style-name="P2">demorganovy zakony (pro zjednoduzseni slozitych vyrazu)</text:p>
          <text:list>
            <text:list-item>
              <text:p text:style-name="P2"/>
            </text:list-item>
          </text:list>
        </text:list-item>
        <text:list-item>
          <text:p text:style-name="P2"><text:soft-page-break/>vennovy diagramy</text:p>
        </text:list-item>
        <text:list-item>
          <text:p text:style-name="P2">prakticke (doptat se)</text:p>
          <text:list>
            <text:list-item>
              <text:p text:style-name="P2">union → maximum ?</text:p>
            </text:list-item>
            <text:list-item>
              <text:p text:style-name="P2">prunik → minimum ?</text:p>
            </text:list-item>
          </text:list>
          <text:p text:style-name="P2"/>
        </text:list-item>
      </text:list>
      <text:p text:style-name="P1">Mohutnost mnozin <text:span text:style-name="T6">(srovnavani)</text:span></text:p>
      <text:list text:style-name="L9">
        <text:list-item>
          <text:p text:style-name="P16">Nastroj pro srovnavani mnozin podle jejich velikosti</text:p>
        </text:list-item>
      </text:list>
      <text:list text:style-name="L2">
        <text:list-item>
          <text:p text:style-name="P15">konecne mnoziny – je to pocet prvku v mnozine</text:p>
        </text:list-item>
        <text:list-item>
          <text:p text:style-name="P15">nekonecne mnoziny – <text:span text:style-name="T8">prokazuje se tak, ze zjistujeme, zda lze prvky obou mnozin sparovat beze zbytku</text:span></text:p>
          <text:list>
            <text:list-item>
              <text:p text:style-name="P17">spocetne – lze prvky “ocislovat” do nekonecne rady (napr. Cela cisla)</text:p>
            </text:list-item>
            <text:list-item>
              <text:p text:style-name="P17">nespocetne – nelze je spocitat (realna cisla)</text:p>
              <text:p text:style-name="P17"/>
            </text:list-item>
          </text:list>
        </text:list-item>
      </text:list>
      <text:p text:style-name="P1">Relace na mnozinach</text:p>
      <text:list text:style-name="L10">
        <text:list-item>
          <text:p text:style-name="P18">je to vztah mezi objekty</text:p>
        </text:list-item>
        <text:list-item>
          <text:p text:style-name="P18">priklad “byt dedeckem”</text:p>
        </text:list-item>
      </text:list>
      <text:list text:style-name="L3">
        <text:list-item>
          <text:p text:style-name="P19">typy relaci</text:p>
          <text:list>
            <text:list-item>
              <text:p text:style-name="P19">reflexivita</text:p>
            </text:list-item>
            <text:list-item>
              <text:p text:style-name="P19"/>
            </text:list-item>
          </text:list>
        </text:list-item>
        <text:list-item>
          <text:p text:style-name="P3">castecne usporadani</text:p>
        </text:list-item>
        <text:list-item>
          <text:p text:style-name="P3">ekvivalence x usporadani</text:p>
        </text:list-item>
        <text:list-item>
          <text:p text:style-name="P3">faktorova mnozin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21:13:11.019016160</meta:creation-date>
    <dc:date>2026-05-12T23:26:01.659290520</dc:date>
    <meta:editing-duration>PT57M45S</meta:editing-duration>
    <meta:editing-cycles>1</meta:editing-cycles>
    <meta:document-statistic meta:table-count="0" meta:image-count="0" meta:object-count="0" meta:page-count="2" meta:paragraph-count="65" meta:word-count="460" meta:character-count="2592" meta:non-whitespace-character-count="2236"/>
    <meta:generator>LibreOffice/24.2.7.2$Linux_X86_64 LibreOffice_project/420$Build-2</meta:generator>
  </office:meta>
</office:document-meta>
</file>