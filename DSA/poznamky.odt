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1af03" officeooo:paragraph-rsid="0011af03"/>
    </style:style>
    <style:style style:name="P2" style:family="paragraph" style:parent-style-name="Text_20_body">
      <style:paragraph-properties style:writing-mode="lr-tb" style:writing-mode-automatic="false"/>
      <style:text-properties officeooo:rsid="0011af03" officeooo:paragraph-rsid="0011af03"/>
    </style:style>
    <style:style style:name="P3" style:family="paragraph" style:parent-style-name="Text_20_body">
      <style:paragraph-properties style:writing-mode="lr-tb" style:writing-mode-automatic="false"/>
      <style:text-properties officeooo:rsid="0012726a" officeooo:paragraph-rsid="001272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726a" style:font-weight-asian="bold" style:font-weight-complex="bold"/>
    </style:style>
    <style:style style:name="T3" style:family="text">
      <style:text-properties officeooo:rsid="001272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tove struktury a algoritmy</text:h>
      <text:h text:style-name="Heading_20_2" text:outline-level="2">Pojmy</text:h>
      <text:p text:style-name="P1"><text:span text:style-name="T1">Datovy typ</text:span> - cislo, retezec, seznam, objekt, ... . Je to druh hodnot a rozsahu</text:p>
      <text:p text:style-name="P1"><text:span text:style-name="T1">Abstraktni datovy typ</text:span> - Definuje pouze syntaxi operaci a jejich chovani. Nezajima ho, jak je toho docileno. </text:p>
      <text:p text:style-name="P2"><text:span text:style-name="T1">D</text:span><text:span text:style-name="T2">a</text:span><text:span text:style-name="T1">tova struktura </text:span>- predstavuje fyzickou implementaci, jak jsou data ulozena</text:p>
      <text:p text:style-name="P2"><text:span text:style-name="T1">Zasobnik</text:span> - ADT typu FILO.</text:p>
      <text:p text:style-name="P2"><text:span text:style-name="T1">Fronta </text:span>- ADT typu FIFO</text:p>
      <text:p text:style-name="P2">Seznam - ADT<text:span text:style-name="T3">, kde</text:span> <text:span text:style-name="T3">jednotlive polozky jsou v rade za sebou. Muze obsahovat dalsi ADT</text:span></text:p>
      <text:p text:style-name="P3">Mnozina - </text:p>
      <text:p text:style-name="P3">Tabulka/Mapa 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5T21:27:02.922217305</meta:creation-date>
    <dc:date>2026-05-25T21:53:27.879113139</dc:date>
    <meta:editing-duration>PT4M1S</meta:editing-duration>
    <meta:editing-cycles>2</meta:editing-cycles>
    <meta:generator>LibreOffice/26.2.3.2$Linux_X86_64 LibreOffice_project/d4d5ed47b6084125f28d269a5650105d54dde034</meta:generator>
    <meta:document-statistic meta:table-count="0" meta:image-count="0" meta:object-count="0" meta:page-count="1" meta:paragraph-count="10" meta:word-count="76" meta:character-count="449" meta:non-whitespace-character-count="380"/>
  </office:meta>
</office:document-meta>
</file>