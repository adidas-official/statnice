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style:writing-mode="lr-tb" style:writing-mode-automatic="false"/>
    </style:style>
    <style:style style:name="P2" style:family="paragraph" style:parent-style-name="Text_20_body">
      <style:text-properties officeooo:rsid="001b385e" officeooo:paragraph-rsid="001b385e"/>
    </style:style>
    <style:style style:name="P3" style:family="paragraph" style:parent-style-name="Text_20_body">
      <style:text-properties officeooo:rsid="0019b4b2" officeooo:paragraph-rsid="0019b4b2"/>
    </style:style>
    <style:style style:name="P4" style:family="paragraph" style:parent-style-name="Text_20_body" style:list-style-name="L1">
      <style:text-properties officeooo:paragraph-rsid="0019b4b2"/>
    </style:style>
    <style:style style:name="P5" style:family="paragraph" style:parent-style-name="Text_20_body" style:list-style-name="L1">
      <style:text-properties officeooo:rsid="0019b4b2" officeooo:paragraph-rsid="0019b4b2"/>
    </style:style>
    <style:style style:name="P6" style:family="paragraph" style:parent-style-name="Text_20_body">
      <style:text-properties officeooo:rsid="001e3ce1" officeooo:paragraph-rsid="001e3ce1"/>
    </style:style>
    <style:style style:name="P7" style:family="paragraph" style:parent-style-name="Text_20_body">
      <style:text-properties officeooo:rsid="001e792b" officeooo:paragraph-rsid="001e792b"/>
    </style:style>
    <style:style style:name="P8" style:family="paragraph" style:parent-style-name="Text_20_body">
      <style:text-properties officeooo:rsid="0020e16d" officeooo:paragraph-rsid="0020e16d"/>
    </style:style>
    <style:style style:name="P9" style:family="paragraph" style:parent-style-name="Text_20_body" style:list-style-name="L2">
      <style:text-properties officeooo:paragraph-rsid="0020e16d"/>
    </style:style>
    <style:style style:name="P10" style:family="paragraph" style:parent-style-name="Text_20_body" style:list-style-name="L2">
      <style:text-properties officeooo:rsid="0020e16d" officeooo:paragraph-rsid="0020e16d"/>
    </style:style>
    <style:style style:name="P11" style:family="paragraph" style:parent-style-name="Text_20_body">
      <style:text-properties officeooo:rsid="00151855" officeooo:paragraph-rsid="0018a74b"/>
    </style:style>
    <style:style style:name="P12" style:family="paragraph" style:parent-style-name="Text_20_body">
      <style:text-properties officeooo:rsid="0017f0b6" officeooo:paragraph-rsid="0018a74b"/>
    </style:style>
    <style:style style:name="P13" style:family="paragraph" style:parent-style-name="Text_20_body">
      <style:text-properties officeooo:rsid="00151855" officeooo:paragraph-rsid="00151855"/>
    </style:style>
    <style:style style:name="P14" style:family="paragraph" style:parent-style-name="Text_20_body" style:list-style-name="L3">
      <style:text-properties officeooo:rsid="00151855" officeooo:paragraph-rsid="00151855"/>
    </style:style>
    <style:style style:name="P15" style:family="paragraph" style:parent-style-name="Text_20_body">
      <style:text-properties officeooo:rsid="001c835e" officeooo:paragraph-rsid="001c835e"/>
    </style:style>
    <style:style style:name="P16" style:family="paragraph" style:parent-style-name="Text_20_body">
      <style:text-properties officeooo:rsid="001dc02d" officeooo:paragraph-rsid="001dc02d"/>
    </style:style>
    <style:style style:name="P17" style:family="paragraph" style:parent-style-name="Text_20_body">
      <style:text-properties officeooo:rsid="000e27ab" officeooo:paragraph-rsid="000e27ab"/>
    </style:style>
    <style:style style:name="P18" style:family="paragraph" style:parent-style-name="Text_20_body">
      <style:text-properties officeooo:rsid="000fb0cc" officeooo:paragraph-rsid="000fb0cc"/>
    </style:style>
    <style:style style:name="P19" style:family="paragraph" style:parent-style-name="Text_20_body" style:list-style-name="L4">
      <style:text-properties officeooo:rsid="00119734" officeooo:paragraph-rsid="00119734"/>
    </style:style>
    <style:style style:name="P20" style:family="paragraph" style:parent-style-name="Text_20_body" style:list-style-name="L4">
      <style:text-properties officeooo:rsid="0012ef8d" officeooo:paragraph-rsid="0012ef8d"/>
    </style:style>
    <style:style style:name="T1" style:family="text">
      <style:text-properties fo:color="#fb9e00" loext:opacity="100%"/>
    </style:style>
    <style:style style:name="T2" style:family="text">
      <style:text-properties fo:color="#00a933" loext:opacity="100%"/>
    </style:style>
    <style:style style:name="T3" style:family="text">
      <style:text-properties officeooo:rsid="0019b4b2"/>
    </style:style>
    <style:style style:name="T4" style:family="text">
      <style:text-properties officeooo:rsid="001b385e"/>
    </style:style>
    <style:style style:name="T5" style:family="text">
      <style:text-properties officeooo:rsid="001e792b"/>
    </style:style>
    <style:style style:name="T6" style:family="text">
      <style:text-properties officeooo:rsid="001f122a"/>
    </style:style>
    <style:style style:name="T7" style:family="text">
      <style:text-properties officeooo:rsid="0020e16d"/>
    </style:style>
    <style:style style:name="T8" style:family="text">
      <style:text-properties officeooo:rsid="0018a74b"/>
    </style:style>
    <style:style style:name="T9" style:family="text">
      <style:text-properties officeooo:rsid="0017f0b6"/>
    </style:style>
    <style:style style:name="T10" style:family="text">
      <style:text-properties officeooo:rsid="00160e11"/>
    </style:style>
    <style:style style:name="T11" style:family="text">
      <style:text-properties officeooo:rsid="001dc02d"/>
    </style:style>
    <style:style style:name="T12" style:family="text">
      <style:text-properties officeooo:rsid="001e3ce1"/>
    </style:style>
    <style:style style:name="T13" style:family="text">
      <style:text-properties officeooo:rsid="000fb0cc"/>
    </style:style>
    <style:style style:name="T14" style:family="text">
      <style:text-properties officeooo:rsid="00119734"/>
    </style:style>
    <style:style style:name="T15" style:family="text">
      <style:text-properties officeooo:rsid="0012ef8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baze</text:h>
      <text:p text:style-name="P1"><text:span text:style-name="T1">Plánování databáze </text:span>(<text:span text:style-name="T1">sběr požadavků a nalézání faktů</text:span>, <text:span text:style-name="T2">uživatelské pohledy</text:span>, <text:span text:style-name="T2">strategie konceptuálního návrhu</text:span>). <text:span text:style-name="T1">Funkční závislosti</text:span> (<text:span text:style-name="T2">definice</text:span>, <text:span text:style-name="T1">Armstrongova pravidla</text:span>, minimální pokrytí, nalezení klíče). <text:span text:style-name="T2">Normální formy relací</text:span> (<text:span text:style-name="T2">definice 1.-3. NF</text:span>, <text:span text:style-name="T2">metody normalizace</text:span>, <text:span text:style-name="T2">pokrytí závislostí,</text:span> <text:span text:style-name="T2">výhody a nevýhody normalizace, denormalizace</text:span>). Pokročilejší rysy jazyka SQL (datové typy a operátory, pohledy, oprávnění, uživatelské role). <text:span text:style-name="T1">Transakce</text:span> (<text:span text:style-name="T1">princip a účel</text:span>, způsoby implementace, prokládání transakcí a související problémy, stupeň izolace a uzamykání). Fyzická vrstva databáze (reprezentace odvozených dat, zajištění integritních omezení, fyzické uložení tabulek, indexy, pohledy). Procedurální rozšíření SQL (účel, použití, kursory a triggery, možnosti pro zajištění integritních omezení). Objektově orientované databáze (motivace, výhody a nevýhody, základy objektového návrhu, třídy, metody, navazování vztahů). Objektově-relační model (motivace, vlastnosti, příklady)</text:p>
      <text:h text:style-name="Heading_20_2" text:outline-level="2">Planovani databaze</text:h>
      <text:p text:style-name="P2">Dulezity je pruzkum verejne dokumentace. Pro sber pozadavku se pouzivaji například dotazniky nebo sledovani celkoveho chodu organizace, rozhovory s otevrenymi i uzavrenymi otazkam.</text:p>
      <text:h text:style-name="Heading_20_3" text:outline-level="3">Definice systemu a celkovy ucel databaze.</text:h>
      <text:p text:style-name="P3">Vymezime rozsah a hranice systemu. Uzivatelske pohled jsou mensi celky, které pro zjednoduzseni pochopeni celkoveho systemu definuji jen vybranou cast pro daneho uzivatele. Pozor na neuplnou nebo nepresnou specifikaci (nedostatecny seznam všech aspektu systemu) a na prehnanou specifikaci (hrozi paraliza analyzou)</text:p>
      <text:h text:style-name="Heading_20_3" text:outline-level="3">Strategie konceptualniho navrhu</text:h>
      <text:list text:style-name="L1">
        <text:list-item>
          <text:p text:style-name="P4"><text:span text:style-name="T3">Top-down: Z globalniho pohledu k detailnim modelum a diagramum.</text:span></text:p>
        </text:list-item>
        <text:list-item>
          <text:p text:style-name="P5">Bottom-up: Od detailu ke globalnimu pohledu seskupovanim</text:p>
        </text:list-item>
        <text:list-item>
          <text:p text:style-name="P5">Inside-out: Specialni pripad Top-Down – zakladem je „krystalizacni jadro, nejdulezitejsi entity, k tem se potom rozsiruji relace k ostatnim entitam.</text:p>
        </text:list-item>
        <text:list-item>
          <text:p text:style-name="P5">Mix: <text:span text:style-name="T4">Rozdeli se na mensi podproblemy a tim se vytvori skeletalni schema. Potom se postupuje libovolnou strategii vyse.</text:span></text:p>
        </text:list-item>
      </text:list>
      <text:h text:style-name="Heading_20_2" text:outline-level="2">Funkcni zavislosti</text:h>
      <text:p text:style-name="P6">Funkcni zavislost <text:span text:style-name="T5">znamena, ze z hodnoty jednoho atributu se da odvodit hodnota jineho. Pokud je v tabulce atribut s hodnotou X, tak jiny atribut bude mit hodnotu Y. A plati to pro vsechny zaznamy v tabulce. Pokud je atribut A1 = X → A2 = Y. Determinantem (to, od ceho se to odvozuje) muze byt kombinace vice sloupcu, ne jen jeden. Nesmi se jednat o shodu nahod.</text:span></text:p>
      <text:p text:style-name="P7">Priklad: <text:span text:style-name="T6">Tabulka s atributy (NAZEV_KINA, JMENO_FILMU) → DATUM</text:span></text:p>
      <text:h text:style-name="Heading_20_3" text:outline-level="3"><text:soft-page-break/>Armstrongova pravidla</text:h>
      <text:p text:style-name="P8">Jsou to odvozovaci pravidla pro zjednoduzseni funkcnich zavislosti. Mechanismus pro hledani skrytych zavislosti, abychom mohli nektere zavislosti odstranit.</text:p>
      <text:h text:style-name="Heading_20_4" text:outline-level="4">Definice pravidel</text:h>
      <text:list text:style-name="L2">
        <text:list-item>
          <text:p text:style-name="P9"><text:span text:style-name="T7">Trivialni FZ: Samo sebe v podstate. Pokud mame atributy (jmeno, prijmeni), potom urcuji atribut jmeno. A prijmeni taky</text:span></text:p>
        </text:list-item>
        <text:list-item>
          <text:p text:style-name="P10">Tranzitivita: X → Y a zaroven Y → Z, potom plati, ze X → Z</text:p>
        </text:list-item>
        <text:list-item>
          <text:p text:style-name="P10">Kompozice: X → Y a zaroven X → Z, potom plati, ze X → YZ</text:p>
        </text:list-item>
        <text:list-item>
          <text:p text:style-name="P10">Dekompozice: X → YZ, potom je mozne rozlozit na X → Y a X → Z </text:p>
        </text:list-item>
      </text:list>
      <text:h text:style-name="Heading_20_2" text:outline-level="2">Normalni formy</text:h>
      <text:h text:style-name="Heading_20_3" text:outline-level="3">Aktualizacni anomalie</text:h>
      <text:p text:style-name="P11"><text:span text:style-name="T8">n</text:span><text:span text:style-name="T9">astava, když mame nekonsistentni data. Muze se stat, ze mame stejnou hodnotu v nekolika tabulkach. Pri uprave jedne tabulky bychom v tomto pripade museli upravit vsechny ostatní. Kdyz nekde zapomeneme nebo se operace nezdari, </text:span><text:span text:style-name="T8">nebudeme casem vedet, které informace plati.</text:span></text:p>
      <text:h text:style-name="Heading_20_3" text:outline-level="3">Problemy s redundanci a prilisnou fragmentaci.</text:h>
      <text:p text:style-name="P12">Databazi navrhujeme tak, abychom nemeli jednu obrovkou tabulku se vsemi daty, ale logicky je rozdelili na souvisejici celky, se kterymi potom pracujeme samostatne. Pro dosazeni tohoto stavu se databaze tzn. normalizuje. Odstranuje se redundance (nadbytecna opakujici se data) a <text:span text:style-name="T8">zaroven souvisejici udaje ponechavame ve stejne tabulce.</text:span></text:p>
      <text:h text:style-name="Heading_20_3" text:outline-level="3">Cil normalizace</text:h>
      <text:p text:style-name="P13">Efektivni zaznamenani dat. <text:span text:style-name="T10">Normalizace se provadi tim, ze se nadbytecna data ze zaznamu odstrani a daji se do samostatne tabulky nebo se rozdeli na atomicke dilce. Nekdy je vhodne i de-normalizovat. Aby se nemuselo prilis mnohokrat joinovat tabulky, muze se na ukor redundance dat databaze z casti denormalizovat a zrychlit tak jeji operacni odezvu.</text:span></text:p>
      <text:h text:style-name="Heading_20_4" text:outline-level="4">Stupne normalizace</text:h>
      <text:list text:style-name="L3">
        <text:list-item>
          <text:p text:style-name="P14">1. NF<text:line-break/>Vsechny datove prvky musí byt atomicke, data nejdou vice delit. Priklad s adresami (ulice, mesto)</text:p>
        </text:list-item>
        <text:list-item>
          <text:p text:style-name="P14">2. NF<text:line-break/><text:span text:style-name="T9">Tyka se jen tabulek, které pro vyhledani zaznamy pouzivaji s</text:span>lozeny priparni klic. <text:span text:style-name="T9">K</text:span><text:span text:style-name="T10">azda informace v zaznamu se musí vazat na cely slozeny klic, ne jen na jeho cast. Adresa kina</text:span></text:p>
        </text:list-item>
        <text:list-item>
          <text:p text:style-name="P14">3. NF<text:line-break/><text:span text:style-name="T10">Odstraneni tranzitivnich zavislosti. </text:span><text:span text:style-name="T9">Vsechny neklicove vlastnosti musí byt zavisle jen a pouze na primarnim klici. Nesmi byt zavisle na zadnem dalsim neklicovem atributu.</text:span></text:p>
        </text:list-item>
        <text:list-item>
          <text:p text:style-name="P14">4. NF</text:p>
        </text:list-item>
        <text:list-item>
          <text:p text:style-name="P14"><text:soft-page-break/>5.NF</text:p>
        </text:list-item>
      </text:list>
      <text:h text:style-name="Heading_20_3" text:outline-level="3">Pokryti zavislosti</text:h>
      <text:p text:style-name="P15">Funkcni zavislost znamena, když jedna vlastnost se odvozuje od jiné nebo od nejake kombinace vlastnosti. Pri dekompozici tabulky na vice tabulek museji byt zavislosti zachovany. Napriklad: V tabulce jsou vlastnosti FIRMA, SIDLO, NADMORSKA VYSKA a sidlo urcuje nadmorskou vysku. Pokud zvolime nevhodnou dekompozici na dve tabulky (FIRMA, <text:span text:style-name="T11">SIDLO</text:span>) a (<text:span text:style-name="T11">FIRMA</text:span>, NADMORSKA VYSKA), <text:span text:style-name="T11">prijdeme o zavislost. </text:span><text:span text:style-name="T12">Do jedne tabulky muzeme napsat data „cznic“, „praha“), a do druhé („cznic“, 400). Kdyz potom pridame další zaznamy („datart“, „praha“) a („datart“, 600), mame ve dvou tabulkach stejne sidlo, ale dva zaznami mají ruznou nadmorskou vysku. Oboji je v Praze, ale jednou je nmv 400 a podruhe je 600. </text:span></text:p>
      <text:h text:style-name="Heading_20_2" text:outline-level="2">Pokrocilejsi rysy SQL</text:h>
      <text:h text:style-name="Heading_20_2" text:outline-level="2">Transakce</text:h>
      <text:p text:style-name="P16">Schopnost databaze vratit se do puvodniho stavu před zacatkem transakce, pokud během ni doslo k nejake chybe. Vykonaji se proste bud vsechny kroky v poradku nebo se nevykona zadny.</text:p>
      <text:h text:style-name="Heading_20_2" text:outline-level="2">Fyzicka vrstva databaze</text:h>
      <text:h text:style-name="Heading_20_2" text:outline-level="2">Proceruralni rozsireni SQL</text:h>
      <text:h text:style-name="Heading_20_2" text:outline-level="2">Objektove orientovane databaze</text:h>
      <text:h text:style-name="Heading_20_2" text:outline-level="2">Objektove relacni model</text:h>
      <text:p text:style-name="Text_20_body"/>
      <text:p text:style-name="Text_20_body">----------------</text:p>
      <text:p text:style-name="P17"><text:span text:style-name="T13">P</text:span>riklady databazovych systemu: mysql, postgresql, ms sql server, oracle</text:p>
      <text:p text:style-name="P17">Entita: <text:span text:style-name="T13">Tabulka databaze. Kolekce dat se stejnymi vlastnostmi. Napriklad entita „student“ bude tabulka a bude mit vlastnostni id, jmeno, prijmeni, rocnik, studijni obor</text:span></text:p>
      <text:p text:style-name="P18">Relace: Vztah mezi entitami. Napriklad entita „student“ a entita „obor“ budou v relaci „student studuje obor“. Entita je mnozina objektu, relace vyjadruje vztah mezi entitami</text:p>
      <text:p text:style-name="P18">Arita: počet entit, které mají mezi sebou relaci</text:p>
      <text:p text:style-name="P18">Kardinalita: <text:span text:style-name="T14">IO pro vztahovy typ. Kolik instanci jedne entity muzu byt v relaci s druhou entitou.</text:span></text:p>
      <text:list text:style-name="L4">
        <text:list-item>
          <text:p text:style-name="P19">1:1 – maximalne jeden objekt entity <text:span text:style-name="T15">na obou stranach. Jedno kino hraje maximalne jeden film a konkretni film se hraje v maximalne v jednom kine</text:span></text:p>
        </text:list-item>
        <text:list-item>
          <text:p text:style-name="P20">1:N – jeden objekt (radek) první entity muzu byt vazan na s mnoha objekty jiné entity. Jedno kino muze hrat N filmu.</text:p>
        </text:list-item>
        <text:list-item>
          <text:p text:style-name="P20"><text:soft-page-break/>M:N – mnoho objektu první entity muze byt ve vztahu s mnoha objekty druhé entity. Kazde kino muze hrat vice filmu a zaroven každý film se muze hrat ve vice kinech.</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cs" fo:country="CZ"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cs" fo:country="CZ"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2T19:22:56.037435126</meta:creation-date>
    <dc:date>2026-05-23T23:33:55.290933495</dc:date>
    <meta:editing-duration>PT19M8S</meta:editing-duration>
    <meta:editing-cycles>4</meta:editing-cycles>
    <meta:generator>LibreOffice/26.2.3.2$Linux_X86_64 LibreOffice_project/d4d5ed47b6084125f28d269a5650105d54dde034</meta:generator>
    <meta:document-statistic meta:table-count="0" meta:image-count="0" meta:object-count="0" meta:page-count="4" meta:paragraph-count="52" meta:word-count="956" meta:character-count="6438" meta:non-whitespace-character-count="5544"/>
  </office:meta>
</office:document-meta>
</file>