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Google Sans Text" svg:font-family="'Google Sans Text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style="normal" officeooo:rsid="0006d590" officeooo:paragraph-rsid="0006d590" style:font-style-asian="normal" style:font-style-complex="normal"/>
    </style:style>
    <style:style style:name="P2" style:family="paragraph" style:parent-style-name="Standard">
      <style:text-properties fo:font-style="normal" officeooo:rsid="00082d99" officeooo:paragraph-rsid="00082d99" style:font-style-asian="normal" style:font-style-complex="normal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Calibri" fo:letter-spacing="-0.0008in" fo:language="cs" fo:country="CZ" fo:font-style="normal" officeooo:rsid="0006d590" officeooo:paragraph-rsid="0006d590" style:font-name-asian="Calibri2" style:font-style-asian="normal" style:font-name-complex="Calibri2" style:font-style-complex="normal"/>
    </style:style>
    <style:style style:name="P4" style:family="paragraph" style:parent-style-name="Heading_20_1">
      <style:text-properties officeooo:paragraph-rsid="001447f0"/>
    </style:style>
    <style:style style:name="P5" style:family="paragraph" style:parent-style-name="Heading_20_2">
      <style:text-properties style:use-window-font-color="true" loext:opacity="0%" fo:font-style="normal" officeooo:rsid="0011e6df" officeooo:paragraph-rsid="0011e6df" style:font-style-asian="normal" style:font-style-complex="normal"/>
    </style:style>
    <style:style style:name="P6" style:family="paragraph" style:parent-style-name="Standard" style:list-style-name="L1">
      <style:text-properties officeooo:paragraph-rsid="000ef478"/>
    </style:style>
    <style:style style:name="P7" style:family="paragraph" style:parent-style-name="Standard" style:list-style-name="L1">
      <style:text-properties style:font-name="Calibri" fo:letter-spacing="-0.0008in" fo:language="cs" fo:country="CZ" fo:font-style="normal" officeooo:rsid="0006d590" officeooo:paragraph-rsid="0006d590" style:font-name-asian="Calibri2" style:font-style-asian="normal" style:font-name-complex="Calibri2" style:font-style-complex="normal"/>
    </style:style>
    <style:style style:name="P8" style:family="paragraph" style:parent-style-name="Standard">
      <style:text-properties style:font-name="Calibri" fo:letter-spacing="-0.0008in" fo:language="cs" fo:country="CZ" fo:font-style="normal" officeooo:rsid="0009fb2b" officeooo:paragraph-rsid="0009fb2b" style:font-name-asian="Calibri2" style:font-style-asian="normal" style:font-name-complex="Calibri2" style:font-style-complex="normal"/>
    </style:style>
    <style:style style:name="P9" style:family="paragraph" style:parent-style-name="Standard">
      <style:text-properties style:font-name="Calibri" fo:letter-spacing="-0.0008in" fo:language="cs" fo:country="CZ" fo:font-style="normal" officeooo:rsid="000a985d" officeooo:paragraph-rsid="000a985d" style:font-name-asian="Calibri2" style:font-style-asian="normal" style:font-name-complex="Calibri2" style:font-style-complex="normal"/>
    </style:style>
    <style:style style:name="P10" style:family="paragraph" style:parent-style-name="Standard">
      <style:text-properties fo:font-style="normal" officeooo:rsid="0009fb2b" officeooo:paragraph-rsid="0009fb2b" style:font-style-asian="normal" style:font-style-complex="normal"/>
    </style:style>
    <style:style style:name="P11" style:family="paragraph" style:parent-style-name="Standard">
      <style:text-properties fo:font-style="normal" officeooo:rsid="0009fb2b" officeooo:paragraph-rsid="000fbdc3" style:font-style-asian="normal" style:font-style-complex="normal"/>
    </style:style>
    <style:style style:name="P12" style:family="paragraph" style:parent-style-name="Standard">
      <style:text-properties fo:font-style="normal" officeooo:rsid="00082d99" officeooo:paragraph-rsid="00082d99" style:font-style-asian="normal" style:font-style-complex="normal"/>
    </style:style>
    <style:style style:name="P13" style:family="paragraph" style:parent-style-name="Standard">
      <style:text-properties fo:font-style="normal" fo:font-weight="bold" officeooo:rsid="000fbdc3" officeooo:paragraph-rsid="000fbdc3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0fc9a0" officeooo:paragraph-rsid="000fc9a0" style:font-style-asian="normal" style:font-weight-asian="bold" style:font-style-complex="normal" style:font-weight-complex="bold"/>
    </style:style>
    <style:style style:name="P15" style:family="paragraph" style:parent-style-name="Standard" style:list-style-name="L1">
      <style:text-properties style:use-window-font-color="true" loext:opacity="0%" fo:font-style="normal" officeooo:rsid="000e365c" officeooo:paragraph-rsid="000ef478" style:font-style-asian="normal" style:font-style-complex="normal"/>
    </style:style>
    <style:style style:name="P16" style:family="paragraph" style:parent-style-name="Standard">
      <style:text-properties style:use-window-font-color="true" loext:opacity="0%" fo:font-style="normal" officeooo:rsid="0012966b" officeooo:paragraph-rsid="0012966b" style:font-style-asian="normal" style:font-style-complex="normal"/>
    </style:style>
    <style:style style:name="P17" style:family="paragraph" style:parent-style-name="Standard">
      <style:text-properties style:use-window-font-color="true" loext:opacity="0%" officeooo:rsid="001447f0" officeooo:paragraph-rsid="001447f0"/>
    </style:style>
    <style:style style:name="P18" style:family="paragraph" style:parent-style-name="Standard">
      <style:text-properties style:font-name="Calibri1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Calibri1" fo:font-style="normal" officeooo:rsid="0006d590" officeooo:paragraph-rsid="0006d590" style:font-style-asian="normal" style:font-style-complex="normal"/>
    </style:style>
    <style:style style:name="P20" style:family="paragraph" style:parent-style-name="Standard">
      <style:text-properties officeooo:rsid="001447f0" officeooo:paragraph-rsid="001447f0"/>
    </style:style>
    <style:style style:name="P21" style:family="paragraph" style:parent-style-name="Text_20_body" style:list-style-name="L3">
      <style:paragraph-properties fo:margin-left="0in" fo:margin-right="0in" fo:margin-top="0in" fo:margin-bottom="0in" style:contextual-spacing="false" fo:line-height="120%" fo:orphans="2" fo:widows="2" fo:text-indent="0in" style:auto-text-indent="false"/>
      <style:text-properties fo:font-variant="normal" fo:text-transform="none" style:use-window-font-color="true" loext:opacity="0%" style:font-name="Google Sans Text" fo:font-size="10.5pt" fo:letter-spacing="normal" fo:font-style="normal" fo:font-weight="normal"/>
    </style:style>
    <style:style style:name="P22" style:family="paragraph" style:parent-style-name="Text_20_body" style:list-style-name="L3">
      <style:paragraph-properties fo:margin-left="0in" fo:margin-right="0in" fo:margin-top="0in" fo:margin-bottom="0in" style:contextual-spacing="false" fo:line-height="120%" fo:orphans="2" fo:widows="2" fo:text-indent="0in" style:auto-text-indent="false"/>
      <style:text-properties fo:font-variant="normal" fo:text-transform="none" style:use-window-font-color="true" loext:opacity="0%" style:font-name="Google Sans Text" fo:font-size="10.5pt" fo:letter-spacing="normal" fo:font-style="normal" fo:font-weight="normal" officeooo:paragraph-rsid="000fbdc3"/>
    </style:style>
    <style:style style:name="P23" style:family="paragraph" style:parent-style-name="Text_20_body">
      <style:text-properties fo:font-variant="normal" fo:text-transform="none" style:use-window-font-color="true" loext:opacity="0%" style:font-name="Google Sans Text" fo:font-size="10.5pt" fo:letter-spacing="normal" fo:font-style="normal" fo:font-weight="normal" officeooo:rsid="000a985d" officeooo:paragraph-rsid="000fbdc3" style:font-style-asian="normal" style:font-style-complex="normal"/>
    </style:style>
    <style:style style:name="P24" style:family="paragraph" style:parent-style-name="Text_20_body">
      <style:text-properties officeooo:rsid="000e365c" officeooo:paragraph-rsid="000e365c"/>
    </style:style>
    <style:style style:name="P25" style:family="paragraph" style:parent-style-name="Text_20_body">
      <style:text-properties officeooo:rsid="000ef478" officeooo:paragraph-rsid="000ef478"/>
    </style:style>
    <style:style style:name="P26" style:family="paragraph" style:parent-style-name="Text_20_body" style:list-style-name="L5">
      <style:text-properties officeooo:rsid="000ef478" officeooo:paragraph-rsid="000ef478"/>
    </style:style>
    <style:style style:name="P27" style:family="paragraph" style:parent-style-name="Text_20_body">
      <style:text-properties fo:font-weight="bold" officeooo:rsid="000ef478" officeooo:paragraph-rsid="000ef478" style:font-weight-asian="bold" style:font-weight-complex="bold"/>
    </style:style>
    <style:style style:name="P28" style:family="paragraph" style:parent-style-name="Text_20_body">
      <style:text-properties officeooo:rsid="001002be" officeooo:paragraph-rsid="001002be"/>
    </style:style>
    <style:style style:name="P29" style:family="paragraph" style:parent-style-name="Text_20_body" style:list-style-name="L6">
      <style:text-properties officeooo:rsid="001002be" officeooo:paragraph-rsid="001002be"/>
    </style:style>
    <style:style style:name="P30" style:family="paragraph" style:parent-style-name="Text_20_body">
      <style:text-properties officeooo:rsid="0011e6df" officeooo:paragraph-rsid="0011e6df"/>
    </style:style>
    <style:style style:name="T1" style:family="text">
      <style:text-properties style:font-name="Calibri" fo:letter-spacing="-0.0008in" fo:language="cs" fo:country="CZ" fo:font-style="italic" style:font-name-asian="Calibri2" style:font-style-asian="italic" style:font-name-complex="Calibri2"/>
    </style:style>
    <style:style style:name="T2" style:family="text">
      <style:text-properties style:font-name="Calibri" fo:letter-spacing="-0.0008in" fo:language="cs" fo:country="CZ" style:font-name-asian="Calibri2" style:font-name-complex="Calibri2"/>
    </style:style>
    <style:style style:name="T3" style:family="text">
      <style:text-properties style:font-name="Calibri" fo:letter-spacing="-0.0008in" fo:language="cs" fo:country="CZ" officeooo:rsid="00065d5a" style:font-name-asian="Calibri2" style:font-name-complex="Calibri2"/>
    </style:style>
    <style:style style:name="T4" style:family="text">
      <style:text-properties style:font-name="Calibri" fo:letter-spacing="-0.0008in" fo:language="cs" fo:country="CZ" officeooo:rsid="000b6f5d" style:font-name-asian="Calibri2" style:font-name-complex="Calibri2"/>
    </style:style>
    <style:style style:name="T5" style:family="text">
      <style:text-properties style:font-name="Calibri" fo:letter-spacing="-0.0008in" fo:language="cs" fo:country="CZ" officeooo:rsid="000c21c4" style:font-name-asian="Calibri2" style:font-name-complex="Calibri2"/>
    </style:style>
    <style:style style:name="T6" style:family="text">
      <style:text-properties style:font-name="Calibri" fo:letter-spacing="-0.0008in" fo:language="cs" fo:country="CZ" officeooo:rsid="000fbdc3" style:font-name-asian="Calibri2" style:font-name-complex="Calibri2"/>
    </style:style>
    <style:style style:name="T7" style:family="text">
      <style:text-properties style:font-name="Calibri" fo:letter-spacing="-0.0008in" fo:language="cs" fo:country="CZ" fo:font-weight="bold" style:font-name-asian="Calibri2" style:font-weight-asian="bold" style:font-name-complex="Calibri2" style:font-weight-complex="bold"/>
    </style:style>
    <style:style style:name="T8" style:family="text">
      <style:text-properties style:font-name="Calibri" fo:letter-spacing="-0.0008in" fo:language="cs" fo:country="CZ" fo:font-weight="bold" officeooo:rsid="000fbdc3" style:font-name-asian="Calibri2" style:font-weight-asian="bold" style:font-name-complex="Calibri2" style:font-weight-complex="bold"/>
    </style:style>
    <style:style style:name="T9" style:family="text">
      <style:text-properties style:font-name="Calibri" fo:letter-spacing="-0.0008in" fo:language="cs" fo:country="CZ" fo:font-style="normal" officeooo:rsid="0006d590" style:font-name-asian="Calibri2" style:font-style-asian="normal" style:font-name-complex="Calibri2" style:font-style-complex="normal"/>
    </style:style>
    <style:style style:name="T10" style:family="text">
      <style:text-properties style:font-name="Calibri" fo:letter-spacing="-0.0008in" fo:language="cs" fo:country="CZ" fo:font-style="normal" officeooo:rsid="001447f0" style:font-name-asian="Calibri2" style:font-style-asian="normal" style:font-name-complex="Calibri2" style:font-style-complex="normal"/>
    </style:style>
    <style:style style:name="T11" style:family="text">
      <style:text-properties style:font-name="Calibri" fo:letter-spacing="-0.0008in" fo:language="cs" fo:country="CZ" fo:font-weight="normal" style:font-name-asian="Calibri2" style:font-weight-asian="normal" style:font-name-complex="Calibri2" style:font-weight-complex="normal"/>
    </style:style>
    <style:style style:name="T12" style:family="text">
      <style:text-properties style:font-name="Calibri" fo:letter-spacing="0.0008in" fo:language="cs" fo:country="CZ" fo:font-weight="bold" style:font-name-asian="Calibri2" style:font-weight-asian="bold" style:font-name-complex="Calibri2"/>
    </style:style>
    <style:style style:name="T13" style:family="text">
      <style:text-properties fo:font-weight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etter-spacing="normal"/>
    </style:style>
    <style:style style:name="T16" style:family="text">
      <style:text-properties fo:letter-spacing="normal" fo:font-weight="bold"/>
    </style:style>
    <style:style style:name="T17" style:family="text">
      <style:text-properties style:use-window-font-color="true" loext:opacity="0%" fo:font-style="normal" style:font-style-asian="normal" style:font-style-complex="normal"/>
    </style:style>
    <style:style style:name="T18" style:family="text">
      <style:text-properties officeooo:rsid="000fbdc3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letter-spacing="-0.0008in" fo:language="cs" fo:country="CZ" fo:font-weight="bold" officeooo:rsid="00065d5a" style:font-name-asian="Calibri2" style:font-name-complex="Calibri2"/>
    </style:style>
    <style:style style:name="T21" style:family="text">
      <style:text-properties fo:letter-spacing="-0.0008in" fo:language="cs" fo:country="CZ" officeooo:rsid="00065d5a" style:font-name-asian="Calibri2" style:font-name-complex="Calibri2"/>
    </style:style>
    <style:style style:name="T22" style:family="text">
      <style:text-properties officeooo:rsid="00118028"/>
    </style:style>
    <style:style style:name="T23" style:family="text">
      <style:text-properties officeooo:rsid="001447f0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color="#00a933" loext:opacity="100%"/>
    </style:style>
    <style:style style:name="T26" style:family="text">
      <style:text-properties style:text-underline-style="none"/>
    </style:style>
    <style:style style:name="T27" style:family="text">
      <style:text-properties fo:color="#ea7500" loext:opacity="100%"/>
    </style:style>
    <style:style style:name="T28" style:family="text">
      <style:text-properties fo:color="#ea7500" loext:opacity="100%" style:text-underline-style="solid" style:text-underline-width="auto" style:text-underline-color="font-color"/>
    </style:style>
    <style:style style:name="T29" style:family="text">
      <style:text-properties fo:color="#ea7500" loext:opacity="100%" style:text-underline-style="none"/>
    </style:style>
    <style:style style:name="T30" style:family="text">
      <style:text-properties fo:color="#ff0000" loext:opacity="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Bezpečnost a ochrana dat (BOD)</text:h>
      <text:p text:style-name="Standard"><text:span text:style-name="T25">Úvod do informační bezpečnosti</text:span>, <text:span text:style-name="T28">l</text:span><text:span text:style-name="T29">egislativa a normy</text:span><text:span text:style-name="T26">.</text:span> <text:span text:style-name="T25">Kryptografie. Proudové šifry, blokové šifry. Hashovací funkce a datová integrita. Symetrické šifrování. Asymetrické šifrovaní, výměna klíčů. Digitální podpisy, identifikace a autentizace entity.</text:span> <text:span text:style-name="T27">Certifikáty a certifikační autority</text:span>. <text:span text:style-name="T27">Komerční/kvalifikované certifikáty, časová razítka.</text:span> <text:span text:style-name="T30">Viry – historie a současnost. Antivirové programy. Chyby v programech, revize kódu, testování bezpečnosti.</text:span></text:p>
      <text:p text:style-name="P20"><text:span text:style-name="T30"/></text:p>
      <text:p text:style-name="P17"><text:span text:style-name="T25">Zpracovano</text:span>, <text:span text:style-name="T27">castecne zpracovano - projit detailneji</text:span>, <text:span text:style-name="T30">nezpracovano</text:span></text:p>
      <text:p text:style-name="Standard"/>
      <text:h text:style-name="Heading_20_2" text:outline-level="2">Uvod:</text:h>
      <text:p text:style-name="P18"><text:span text:style-name="T20">Aktivum:</text:span><text:span text:style-name="T21"> Cokoliv, co má pro organizaci určitou hodnotu, od informací a dat přes hardware a software až po samotné uživatele a zaměstnance.</text:span></text:p>
      <text:p text:style-name="P18"><text:span text:style-name="T13">Důvěrnost (Confidentiality):</text:span> Zajištění stavu, kdy mají k informacím přístup pouze ty osoby a subjekty, které jsou k tomu výslovně oprávněny.</text:p>
      <text:p text:style-name="P18"><text:span text:style-name="T13">Integrita (Integrity):</text:span> Zabezpečení naprosté přesnosti, neporušenosti a kompletnosti informací i metod jejich zpracování.</text:p>
      <text:p text:style-name="P18"><text:span text:style-name="T13">Dostupnost (Availability):</text:span> Zaručení toho, že informace a systémy jsou uživatelům plně přístupné právě ve chvíli, kdy je potřebují.</text:p>
      <text:p text:style-name="P18"><text:span text:style-name="T13">Zranitelnost (Vulnerability):</text:span> Slabé místo informačního systému nebo aktiva (např. chyba v softwaru, lidský faktor), které může být zneužito k napáchání škody.</text:p>
      <text:p text:style-name="P18"><text:span text:style-name="T13">Hrozba (Threat):</text:span> Potenciální příčina bezpečnostního incidentu (může být úmyslná i neúmyslná), jež se snaží zranitelného místa využít k útoku.</text:p>
      <text:p text:style-name="P18"><text:span text:style-name="T13">Riziko (Risk):</text:span> Pravděpodobnost, s jakou daná hrozba skutečně využije zranitelnost a způsobí organizaci poškození nebo zničení aktiv.</text:p>
      <text:p text:style-name="P18"><text:span text:style-name="T13">Dopad (Impact):</text:span> Výsledek uplatněné hrozby, tedy reálná škoda nebo destrukce způsobená bezpečnostním incidentem.</text:p>
      <text:p text:style-name="P18"><text:span text:style-name="T13">Autentizace:</text:span> Bezpečnostní proces, při kterém se ověřuje pravost identity přistupujícího subjektu (např. uživatele) nebo objektu.</text:p>
      <text:p text:style-name="P18"><text:span text:style-name="T13">Autorizace:</text:span> Následný proces po autentizaci, který určuje, zda má daný subjekt oprávnění a důvěryhodnost k provedení konkrétní činnosti.</text:p>
      <text:p text:style-name="P18"><text:span text:style-name="T16">Analýza rizik (AR):</text:span><text:span text:style-name="T15"> Klíčový proces zjišťování, co se stane při nechránění informací, jak může být bezpečnost narušena a s jakou pravděpodobností, jehož cílem je snížit rizika na přijatelnou úroveň</text:span></text:p>
      <text:p text:style-name="P19"><text:span text:style-name="T21"/></text:p>
      <text:h text:style-name="Heading_20_3" text:outline-level="3"><text:span text:style-name="T3">D</text:span><text:span text:style-name="T2">ruhy bezpecnostnich politik:</text:span></text:h>
      <text:p text:style-name="P3"><text:span text:style-name="T14">promiskuitni</text:span> – vsechno povoleno</text:p>
      <text:p text:style-name="P3"><text:span text:style-name="T14">liberalni</text:span> – blacklist</text:p>
      <text:p text:style-name="P3"><text:span text:style-name="T14">racionalni</text:span> – whitelist </text:p>
      <text:p text:style-name="P3"><text:span text:style-name="T14">paranoidni</text:span> – vsechno zakazano i za cenu ztraty funkcnosti</text:p>
      <text:p text:style-name="P1"><text:span text:style-name="T2"/></text:p>
      <text:h text:style-name="Heading_20_3" text:outline-level="3"><text:soft-page-break/>ALE:</text:h>
      <text:h text:style-name="Heading_20_3" text:outline-level="3">Zalohy:</text:h>
      <text:list xml:id="list3174689990" text:style-name="L1">
        <text:list-item>
          <text:p text:style-name="P7">Cold – <text:span text:style-name="T23">Zcela offline, data vetsinou na magnetickych paskach. Nasazeni není mozne bez predchozi pripravy.</text:span></text:p>
        </text:list-item>
        <text:list-item>
          <text:p text:style-name="P7">Cloud – <text:span text:style-name="T23">Data jsou u treti strany.</text:span></text:p>
        </text:list-item>
        <text:list-item>
          <text:p text:style-name="P7">Warm - </text:p>
        </text:list-item>
        <text:list-item>
          <text:p text:style-name="P6"><text:span text:style-name="T9">Hot –</text:span><text:span text:style-name="T10"> kompletni kopie vcetne hardwaru. Mozne nasadit okamzite, bez prodlevy, uzivatel si nevsimne zmeny.</text:span></text:p>
        </text:list-item>
      </text:list>
      <text:h text:style-name="Heading_20_3" text:outline-level="3">Typy bezpecnostnich funkci:</text:h>
      <text:list text:continue-numbering="true" text:style-name="L1">
        <text:list-item>
          <text:p text:style-name="P15"><text:span text:style-name="T14">Administrativni</text:span>: Nemají technologickou ani fyzickou podobu, ale zaměřují se na řízení lidí, procesů a pravidel v organizaci. Bezpecnostni politiky, smernice, havarijni plany,...</text:p>
        </text:list-item>
        <text:list-item>
          <text:p text:style-name="P15"><text:span text:style-name="T14">Fyzicke</text:span>: Ucelem je znemoznit utocnikovy fyzicky pristup. Ploty, alarmy, bezpecnostni dvere, straze, kamery</text:p>
        </text:list-item>
        <text:list-item>
          <text:p text:style-name="P15"><text:span text:style-name="T7">Logicke</text:span><text:span text:style-name="T2">: Nastroje pro overeni identity. Autentizacni mechanismy, hesla, tokeny. Ochrana dat a systemu pomoci Firewallu, segmentace VLAN, IDS/IPS</text:span></text:p>
        </text:list-item>
      </text:list>
      <text:h text:style-name="Heading_20_2" text:outline-level="2"/>
      <text:h text:style-name="Heading_20_2" text:outline-level="2">Zajisteni duvernosti</text:h>
      <text:p text:style-name="P24">Duvernost (Confidentiality) je prvna pravidlo z CIA triady. Duvernost je zachovana, pokud pristup k informaci ma pouze zamyslena osoba. Pokud zpravu precte kdokoliv jiny, je duvernost porusena.</text:p>
      <text:h text:style-name="Heading_20_3" text:outline-level="3">Typy utajeni zprav</text:h>
      <text:p text:style-name="P2"><text:span text:style-name="T7">Steganografie</text:span><text:span text:style-name="T2"> – </text:span><text:span text:style-name="T5">existence zprávy je skryta</text:span></text:p>
      <text:p text:style-name="P2"><text:span text:style-name="T7">Kryptografie </text:span><text:span text:style-name="T2">– </text:span><text:span text:style-name="T5">zprava není skryta, ale je necitelna</text:span></text:p>
      <text:p text:style-name="P2"><text:span text:style-name="T5"/></text:p>
      <text:h text:style-name="Heading_20_3" text:outline-level="3">Kryptografie</text:h>
      <text:p text:style-name="P25">Vyznam zpravy je zmenen pomoci sifrovani. </text:p>
      <text:h text:style-name="Heading_20_4" text:outline-level="4">Typy sifrovani:</text:h>
      <text:list text:style-name="L6">
        <text:list-item>
          <text:p text:style-name="P29">Symetricke – pro sifrovani i desifrovani se pouziva stejny klic. Rychle, ale hrozi unik klice.</text:p>
        </text:list-item>
        <text:list-item>
          <text:p text:style-name="P29">Asymetrické – pouziva se koncept dvou klicu; verejny a soukromi. Je vypocetne narocnejsi nez symetricke sifrovani.<text:line-break/>RSA – Prvni sifra, ktera tento koncept uspesne pouzivala<text:line-break/>ECC – Kryptografie nad eliptickymi krivkami. Zajistuje stejnou bezpecnost jako RSA, ale s mnohem kratsimi klici.<text:line-break/><text:span text:style-name="T22">EIGamal – sifrovana data jsou dvakrat delsi nez otevreny text</text:span></text:p>
        </text:list-item>
        <text:list-item>
          <text:p text:style-name="P29">Hybridni – Spojeni bezpecnosti z asym. a rychlosti symetrickych sifer. Zprava se zasifruje pomoci symetrickeho sifrovaciho algoritmu, klic se zasifruje pomoci rsa a prenese se k prijemci.</text:p>
        </text:list-item>
      </text:list>
      <text:p text:style-name="P28"><text:soft-page-break/></text:p>
      <text:p text:style-name="P27">Druhy sifer:</text:p>
      <text:list text:style-name="L5">
        <text:list-item>
          <text:p text:style-name="P26">Substitucni: nahrazeni pismen za jine pismeno podle pravidel</text:p>
        </text:list-item>
        <text:list-item>
          <text:p text:style-name="P26">Transpozicni: prohozeni poradi pismen – presmycky: hra → rah</text:p>
        </text:list-item>
        <text:list-item>
          <text:p text:style-name="P26">Proudove sifry: Sifrovani zprav o predem nezname delce. Vytvori se nekonecny proud binarnich dat (klic), sifruje se XOR operaci bit po bitu. Priklad Vernamova sifra: neprolomitelna, klic je stejne dlouhy jako samotna zprava a je pouzit pouze jednou <text:span text:style-name="T18">(kvuli kryptoanalyze)</text:span>. Klic je dokonale nahodny.</text:p>
        </text:list-item>
        <text:list-item>
          <text:p text:style-name="P26">Blokove sifry: Zprava se rozdeli na bloky stejne delky, sifruje se vzdy cely blok. Zasifrovane bloky se pridavaji za sebe. Priklady AES, DES, TrippleDES</text:p>
        </text:list-item>
      </text:list>
      <text:h text:style-name="Heading_20_4" text:outline-level="4">Kershofuf princip v kryptografii</text:h>
      <text:p text:style-name="P8"><text:span text:style-name="T18">Bezpecnost sifry</text:span> <text:span text:style-name="T18">zavisi na utajeni klice, nikoliv na utajeni algoritmu</text:span></text:p>
      <text:p text:style-name="P10"><text:span text:style-name="T2"/></text:p>
      <text:h text:style-name="Heading_20_3" text:outline-level="3">Prikalady sifer</text:h>
      <text:p text:style-name="P11"><text:span text:style-name="T7">DES</text:span><text:span text:style-name="T2"> </text:span><text:span text:style-name="T8">(blokova)</text:span><text:span text:style-name="T2">– počet bitu v bloku </text:span><text:span text:style-name="T5">(56)</text:span><text:span text:style-name="T2">, komponenty, proc se uz nepouziva </text:span><text:span text:style-name="T5">(rychlost)</text:span><text:span text:style-name="T2">, </text:span><text:span text:style-name="T4">slabi klic </text:span><text:span text:style-name="T5">(generuje stejne bloky, sifra = otevreny text)</text:span></text:p>
      <text:p text:style-name="P11"><text:span text:style-name="T7">AES </text:span><text:span text:style-name="T8">(blokova)</text:span><text:span text:style-name="T2"> – </text:span><text:span text:style-name="T6">Advance Encryption Standart – dnes nejpouzivanejsi sifrovaci algoritmus. Pracuje s delky klicu 128, 192 a 256.</text:span></text:p>
      <text:p text:style-name="P13"><text:span text:style-name="T2">RC4 (Proudova) –</text:span><text:span text:style-name="T11"> pouzivala se ve WEP, zdrojovy kod pozdeji unikl. Dnes se uz nepouziva, protože generator klicu generoval slabe klice.</text:span></text:p>
      <text:p text:style-name="P14"><text:span text:style-name="T2">A5</text:span><text:span text:style-name="T11"> – Vyvynuta pro sifrovani GSM hovoru</text:span></text:p>
      <text:p text:style-name="P9">Odolnost proti nalezeni vzoru a druheho vzoru: co je vzor a druhy vzor</text:p>
      <text:p text:style-name="P23">Hledám zprávu jen na základě jejího hashe → hledám <text:span text:style-name="T13">vzor</text:span> (Preimage).<text:span text:style-name="T18">RC4</text:span></text:p>
      <text:list text:style-name="L3">
        <text:list-item>
          <text:p text:style-name="P22">Mám zprávu a hledám k ní jinou se stejným hashem → hledám <text:span text:style-name="T13">druhý vzor</text:span> (Second preimage).</text:p>
        </text:list-item>
        <text:list-item>
          <text:p text:style-name="P21">Hledám jakékoliv dvě náhodné zprávy, které budou mít stejný hash → hledám <text:span text:style-name="T13">kolizi</text:span> (Collision).</text:p>
        </text:list-item>
      </text:list>
      <text:h text:style-name="Heading_20_3" text:outline-level="3">Kvantova kryptografie</text:h>
      <text:p text:style-name="P16">Shoruv algoritmus z roku 1993 ukazal, ze kvantove pocitace by v principu mohlo prolomit RSA faktorizaci. Nektere vlady a entity proto aplikuji proces <text:span text:style-name="T14">Store now, decrypt later.</text:span><text:span text:style-name="T19"> Dnes zasifrovane zpravy shromazduji, i kdyz je nedokazi rozlustit. Az budou mit k dispozici kvantovy pocitac, mohou zpravy desifrovat. Nektera data zustavaji relevantni po desetileti, proto se vyplati pockat.</text:span></text:p>
      <text:h text:style-name="P5" text:outline-level="2" text:is-list-header="true">Certifikaty</text:h>
      <text:p text:style-name="P30"><text:span text:style-name="T17">Zajistuji integritu zprav. Odesilatel vytvori digitalni podpis. Svym privatnim klicem hash zpravy zasifruje vysledny retezec pripoji ke zprave. Prijemce potom pro desifrovani pouzije verejny klic odesilatele, vyjde mu hash zpravy. Z prijate zpravy potom sam vytvori hash a porovna, jestli jsou hashe stejne.</text:span></text:p>
      <text:h text:style-name="Heading_20_3" text:outline-level="3"><text:soft-page-break/>Certifikacni autority</text:h>
      <text:p text:style-name="P16">CA je duveryhodna strana, ktera garantuje, ze pouzity certifikat skutecne patri tomu, kdo ho pouzil.</text:p>
      <text:p text:style-name="P16">Z ceskych je to napriklad PostSignum od Ceske post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Google Sans Text" svg:font-family="'Google Sans Text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3T21:52:15.282383233</meta:creation-date>
    <dc:date>2026-05-16T13:03:55.276398938</dc:date>
    <meta:editing-duration>PT19M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4" meta:paragraph-count="64" meta:word-count="885" meta:character-count="6338" meta:non-whitespace-character-count="5509"/>
  </office:meta>
</office:document-meta>
</file>