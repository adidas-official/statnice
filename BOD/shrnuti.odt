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1447f0"/>
    </style:style>
    <style:style style:name="P2" style:family="paragraph" style:parent-style-name="Standard">
      <style:text-properties officeooo:rsid="001447f0" officeooo:paragraph-rsid="001447f0"/>
    </style:style>
    <style:style style:name="P3" style:family="paragraph" style:parent-style-name="Standard">
      <style:text-properties style:use-window-font-color="true" loext:opacity="0%" officeooo:rsid="001447f0" officeooo:paragraph-rsid="001447f0"/>
    </style:style>
    <style:style style:name="P4" style:family="paragraph" style:parent-style-name="Standard">
      <style:text-properties style:font-name="Calibri1"/>
    </style:style>
    <style:style style:name="P5" style:family="paragraph" style:parent-style-name="Standard">
      <style:paragraph-properties fo:margin-left="0in" fo:margin-right="0in" fo:text-indent="0in" style:auto-text-indent="false"/>
      <style:text-properties style:font-name="Calibri1" fo:font-style="normal" officeooo:rsid="0006d590" officeooo:paragraph-rsid="0006d590" style:font-style-asian="normal" style:font-style-complex="normal"/>
    </style:style>
    <style:style style:name="P6" style:family="paragraph" style:parent-style-name="Standard">
      <style:paragraph-properties fo:margin-left="0in" fo:margin-right="0in" fo:text-indent="0in" style:auto-text-indent="false"/>
      <style:text-properties style:font-name="Calibri" fo:letter-spacing="-0.0008in" fo:language="cs" fo:country="CZ" fo:font-style="normal" officeooo:rsid="0006d590" officeooo:paragraph-rsid="0006d590" style:font-name-asian="Calibri2" style:font-style-asian="normal" style:font-name-complex="Calibri2" style:font-style-complex="normal"/>
    </style:style>
    <style:style style:name="P7" style:family="paragraph" style:parent-style-name="Standard">
      <style:paragraph-properties fo:margin-left="0in" fo:margin-right="0in" fo:text-indent="0in" style:auto-text-indent="false"/>
      <style:text-properties fo:font-style="normal" officeooo:rsid="0006d590" officeooo:paragraph-rsid="0006d590" style:font-style-asian="normal" style:font-style-complex="normal"/>
    </style:style>
    <style:style style:name="P8" style:family="paragraph" style:parent-style-name="Text_20_body">
      <style:text-properties officeooo:rsid="0015f62e" officeooo:paragraph-rsid="0015f62e"/>
    </style:style>
    <style:style style:name="P9" style:family="paragraph" style:parent-style-name="Standard" style:list-style-name="L1">
      <style:text-properties style:font-name="Calibri" fo:letter-spacing="-0.0008in" fo:language="cs" fo:country="CZ" fo:font-style="normal" officeooo:rsid="0006d590" officeooo:paragraph-rsid="0006d590" style:font-name-asian="Calibri2" style:font-style-asian="normal" style:font-name-complex="Calibri2" style:font-style-complex="normal"/>
    </style:style>
    <style:style style:name="P10" style:family="paragraph" style:parent-style-name="Standard" style:list-style-name="L1">
      <style:text-properties officeooo:paragraph-rsid="000ef478"/>
    </style:style>
    <style:style style:name="P11" style:family="paragraph" style:parent-style-name="Standard" style:list-style-name="L1">
      <style:text-properties style:use-window-font-color="true" loext:opacity="0%" fo:font-style="normal" officeooo:rsid="000e365c" officeooo:paragraph-rsid="000ef478" style:font-style-asian="normal" style:font-style-complex="normal"/>
    </style:style>
    <style:style style:name="P12" style:family="paragraph" style:parent-style-name="Text_20_body">
      <style:text-properties officeooo:rsid="000e365c" officeooo:paragraph-rsid="000e365c"/>
    </style:style>
    <style:style style:name="P13" style:family="paragraph" style:parent-style-name="Standard">
      <style:text-properties fo:font-style="normal" officeooo:rsid="00082d99" officeooo:paragraph-rsid="00082d99" style:font-style-asian="normal" style:font-style-complex="normal"/>
    </style:style>
    <style:style style:name="P14" style:family="paragraph" style:parent-style-name="Text_20_body">
      <style:text-properties officeooo:rsid="000ef478" officeooo:paragraph-rsid="000ef478"/>
    </style:style>
    <style:style style:name="P15" style:family="paragraph" style:parent-style-name="Text_20_body" style:list-style-name="L2">
      <style:text-properties officeooo:rsid="001002be" officeooo:paragraph-rsid="001002be"/>
    </style:style>
    <style:style style:name="P16" style:family="paragraph" style:parent-style-name="Text_20_body">
      <style:text-properties officeooo:rsid="001002be" officeooo:paragraph-rsid="001002be"/>
    </style:style>
    <style:style style:name="P17" style:family="paragraph" style:parent-style-name="Text_20_body">
      <style:text-properties fo:font-weight="bold" officeooo:rsid="000ef478" officeooo:paragraph-rsid="000ef478" style:font-weight-asian="bold" style:font-weight-complex="bold"/>
    </style:style>
    <style:style style:name="P18" style:family="paragraph" style:parent-style-name="Text_20_body" style:list-style-name="L3">
      <style:text-properties officeooo:rsid="000ef478" officeooo:paragraph-rsid="000ef478"/>
    </style:style>
    <style:style style:name="P19" style:family="paragraph" style:parent-style-name="Standard">
      <style:text-properties style:font-name="Calibri" fo:letter-spacing="-0.0008in" fo:language="cs" fo:country="CZ" fo:font-style="normal" officeooo:rsid="0009fb2b" officeooo:paragraph-rsid="0009fb2b" style:font-name-asian="Calibri2" style:font-style-asian="normal" style:font-name-complex="Calibri2" style:font-style-complex="normal"/>
    </style:style>
    <style:style style:name="P20" style:family="paragraph" style:parent-style-name="Standard">
      <style:text-properties fo:font-style="normal" officeooo:rsid="0009fb2b" officeooo:paragraph-rsid="0009fb2b" style:font-style-asian="normal" style:font-style-complex="normal"/>
    </style:style>
    <style:style style:name="P21" style:family="paragraph" style:parent-style-name="Standard">
      <style:text-properties fo:font-style="normal" officeooo:rsid="0009fb2b" officeooo:paragraph-rsid="000fbdc3" style:font-style-asian="normal" style:font-style-complex="normal"/>
    </style:style>
    <style:style style:name="P22" style:family="paragraph" style:parent-style-name="Standard">
      <style:text-properties fo:font-style="normal" fo:font-weight="bold" officeooo:rsid="000fbdc3" officeooo:paragraph-rsid="000fbdc3" style:font-style-asian="normal" style:font-weight-asian="bold" style:font-style-complex="normal" style:font-weight-complex="bold"/>
    </style:style>
    <style:style style:name="P23" style:family="paragraph" style:parent-style-name="Standard">
      <style:text-properties fo:font-style="normal" fo:font-weight="bold" officeooo:rsid="000fc9a0" officeooo:paragraph-rsid="000fc9a0" style:font-style-asian="normal" style:font-weight-asian="bold" style:font-style-complex="normal" style:font-weight-complex="bold"/>
    </style:style>
    <style:style style:name="P24" style:family="paragraph" style:parent-style-name="Standard">
      <style:text-properties style:font-name="Calibri" fo:letter-spacing="-0.0008in" fo:language="cs" fo:country="CZ" fo:font-style="normal" officeooo:rsid="000a985d" officeooo:paragraph-rsid="000a985d" style:font-name-asian="Calibri2" style:font-style-asian="normal" style:font-name-complex="Calibri2" style:font-style-complex="normal"/>
    </style:style>
    <style:style style:name="P25" style:family="paragraph" style:parent-style-name="Text_20_body">
      <style:text-properties fo:font-variant="normal" fo:text-transform="none" style:use-window-font-color="true" loext:opacity="0%" style:font-name="Google Sans Text" fo:font-size="10.5pt" fo:letter-spacing="normal" fo:font-style="normal" fo:font-weight="normal" officeooo:rsid="000a985d" officeooo:paragraph-rsid="000fbdc3" style:font-style-asian="normal" style:font-style-complex="normal"/>
    </style:style>
    <style:style style:name="P26" style:family="paragraph" style:parent-style-name="Text_20_body" style:list-style-name="L4">
      <style:paragraph-properties fo:margin-left="0in" fo:margin-right="0in" fo:margin-top="0in" fo:margin-bottom="0in" style:contextual-spacing="false" fo:line-height="120%" fo:orphans="2" fo:widows="2" fo:text-indent="0in" style:auto-text-indent="false"/>
      <style:text-properties fo:font-variant="normal" fo:text-transform="none" style:use-window-font-color="true" loext:opacity="0%" style:font-name="Google Sans Text" fo:font-size="10.5pt" fo:letter-spacing="normal" fo:font-style="normal" fo:font-weight="normal" officeooo:paragraph-rsid="000fbdc3"/>
    </style:style>
    <style:style style:name="P27" style:family="paragraph" style:parent-style-name="Text_20_body" style:list-style-name="L4">
      <style:paragraph-properties fo:margin-left="0in" fo:margin-right="0in" fo:margin-top="0in" fo:margin-bottom="0in" style:contextual-spacing="false" fo:line-height="120%" fo:orphans="2" fo:widows="2" fo:text-indent="0in" style:auto-text-indent="false"/>
      <style:text-properties fo:font-variant="normal" fo:text-transform="none" style:use-window-font-color="true" loext:opacity="0%" style:font-name="Google Sans Text" fo:font-size="10.5pt" fo:letter-spacing="normal" fo:font-style="normal" fo:font-weight="normal"/>
    </style:style>
    <style:style style:name="P28" style:family="paragraph" style:parent-style-name="Standard">
      <style:text-properties style:use-window-font-color="true" loext:opacity="0%" fo:font-style="normal" officeooo:rsid="0012966b" officeooo:paragraph-rsid="0012966b" style:font-style-asian="normal" style:font-style-complex="normal"/>
    </style:style>
    <style:style style:name="P29" style:family="paragraph" style:parent-style-name="Heading_20_2">
      <style:text-properties style:use-window-font-color="true" loext:opacity="0%" fo:font-style="normal" officeooo:rsid="0011e6df" officeooo:paragraph-rsid="0011e6df" style:font-style-asian="normal" style:font-style-complex="normal"/>
    </style:style>
    <style:style style:name="P30" style:family="paragraph" style:parent-style-name="Text_20_body">
      <style:text-properties style:use-window-font-color="true" loext:opacity="0%" fo:font-style="normal" officeooo:rsid="0011e6df" officeooo:paragraph-rsid="0011e6df" style:font-style-asian="normal" style:font-style-complex="normal"/>
    </style:style>
    <style:style style:name="P31" style:family="paragraph" style:parent-style-name="Heading_20_2">
      <style:text-properties officeooo:rsid="00179b5a" officeooo:paragraph-rsid="00179b5a"/>
    </style:style>
    <style:style style:name="P32" style:family="paragraph" style:parent-style-name="Text_20_body">
      <style:text-properties officeooo:rsid="00179b5a" officeooo:paragraph-rsid="00179b5a"/>
    </style:style>
    <style:style style:name="P33" style:family="paragraph" style:parent-style-name="Text_20_body">
      <style:text-properties officeooo:rsid="0018619e" officeooo:paragraph-rsid="0018619e"/>
    </style:style>
    <style:style style:name="P34" style:family="paragraph" style:parent-style-name="Text_20_body" style:list-style-name="L5">
      <style:text-properties officeooo:rsid="00199295" officeooo:paragraph-rsid="00199295"/>
    </style:style>
    <style:style style:name="P35" style:family="paragraph" style:parent-style-name="Text_20_body">
      <style:text-properties officeooo:rsid="001ad277" officeooo:paragraph-rsid="001ad277"/>
    </style:style>
    <style:style style:name="P36" style:family="paragraph" style:parent-style-name="Text_20_body" style:list-style-name="L6">
      <style:text-properties officeooo:rsid="001ad277" officeooo:paragraph-rsid="001ad277"/>
    </style:style>
    <style:style style:name="T1" style:family="text">
      <style:text-properties fo:color="#00a933" loext:opacity="100%"/>
    </style:style>
    <style:style style:name="T2" style:family="text">
      <style:text-properties fo:color="#ea7500" loext:opacity="100%" style:text-underline-style="solid" style:text-underline-width="auto" style:text-underline-color="font-color"/>
    </style:style>
    <style:style style:name="T3" style:family="text">
      <style:text-properties fo:color="#ea7500" loext:opacity="100%" style:text-underline-style="none"/>
    </style:style>
    <style:style style:name="T4" style:family="text">
      <style:text-properties style:text-underline-style="none"/>
    </style:style>
    <style:style style:name="T5" style:family="text">
      <style:text-properties fo:color="#ea7500" loext:opacity="100%"/>
    </style:style>
    <style:style style:name="T6" style:family="text">
      <style:text-properties fo:color="#ff0000" loext:opacity="100%"/>
    </style:style>
    <style:style style:name="T7" style:family="text">
      <style:text-properties fo:letter-spacing="-0.0008in" fo:language="cs" fo:country="CZ" fo:font-weight="bold" officeooo:rsid="00065d5a" style:font-name-asian="Calibri2" style:font-name-complex="Calibri2"/>
    </style:style>
    <style:style style:name="T8" style:family="text">
      <style:text-properties fo:letter-spacing="-0.0008in" fo:language="cs" fo:country="CZ" officeooo:rsid="00065d5a" style:font-name-asian="Calibri2" style:font-name-complex="Calibri2"/>
    </style:style>
    <style:style style:name="T9" style:family="text">
      <style:text-properties fo:font-weight="bold"/>
    </style:style>
    <style:style style:name="T10" style:family="text">
      <style:text-properties fo:letter-spacing="normal" fo:font-weight="bold"/>
    </style:style>
    <style:style style:name="T11" style:family="text">
      <style:text-properties fo:letter-spacing="normal"/>
    </style:style>
    <style:style style:name="T12" style:family="text">
      <style:text-properties style:font-name="Calibri" fo:letter-spacing="-0.0008in" fo:language="cs" fo:country="CZ" officeooo:rsid="00065d5a" style:font-name-asian="Calibri2" style:font-name-complex="Calibri2"/>
    </style:style>
    <style:style style:name="T13" style:family="text">
      <style:text-properties style:font-name="Calibri" fo:letter-spacing="-0.0008in" fo:language="cs" fo:country="CZ" style:font-name-asian="Calibri2" style:font-name-complex="Calibri2"/>
    </style:style>
    <style:style style:name="T14" style:family="text">
      <style:text-properties fo:font-weight="bold" style:font-weight-asian="bold" style:font-weight-complex="bold"/>
    </style:style>
    <style:style style:name="T15" style:family="text">
      <style:text-properties officeooo:rsid="0015f62e"/>
    </style:style>
    <style:style style:name="T16" style:family="text">
      <style:text-properties officeooo:rsid="001447f0"/>
    </style:style>
    <style:style style:name="T17" style:family="text">
      <style:text-properties style:font-name="Calibri" fo:letter-spacing="-0.0008in" fo:language="cs" fo:country="CZ" fo:font-style="normal" officeooo:rsid="0006d590" style:font-name-asian="Calibri2" style:font-style-asian="normal" style:font-name-complex="Calibri2" style:font-style-complex="normal"/>
    </style:style>
    <style:style style:name="T18" style:family="text">
      <style:text-properties style:font-name="Calibri" fo:letter-spacing="-0.0008in" fo:language="cs" fo:country="CZ" fo:font-style="normal" officeooo:rsid="001447f0" style:font-name-asian="Calibri2" style:font-style-asian="normal" style:font-name-complex="Calibri2" style:font-style-complex="normal"/>
    </style:style>
    <style:style style:name="T19" style:family="text">
      <style:text-properties style:font-name="Calibri" fo:letter-spacing="-0.0008in" fo:language="cs" fo:country="CZ" fo:font-weight="bold" style:font-name-asian="Calibri2" style:font-weight-asian="bold" style:font-name-complex="Calibri2" style:font-weight-complex="bold"/>
    </style:style>
    <style:style style:name="T20" style:family="text">
      <style:text-properties style:font-name="Calibri" fo:letter-spacing="-0.0008in" fo:language="cs" fo:country="CZ" officeooo:rsid="000c21c4" style:font-name-asian="Calibri2" style:font-name-complex="Calibri2"/>
    </style:style>
    <style:style style:name="T21" style:family="text">
      <style:text-properties officeooo:rsid="00118028"/>
    </style:style>
    <style:style style:name="T22" style:family="text">
      <style:text-properties officeooo:rsid="000fbdc3"/>
    </style:style>
    <style:style style:name="T23" style:family="text">
      <style:text-properties style:font-name="Calibri" fo:letter-spacing="-0.0008in" fo:language="cs" fo:country="CZ" fo:font-weight="bold" officeooo:rsid="000fbdc3" style:font-name-asian="Calibri2" style:font-weight-asian="bold" style:font-name-complex="Calibri2" style:font-weight-complex="bold"/>
    </style:style>
    <style:style style:name="T24" style:family="text">
      <style:text-properties style:font-name="Calibri" fo:letter-spacing="-0.0008in" fo:language="cs" fo:country="CZ" officeooo:rsid="000b6f5d" style:font-name-asian="Calibri2" style:font-name-complex="Calibri2"/>
    </style:style>
    <style:style style:name="T25" style:family="text">
      <style:text-properties style:font-name="Calibri" fo:letter-spacing="-0.0008in" fo:language="cs" fo:country="CZ" officeooo:rsid="000fbdc3" style:font-name-asian="Calibri2" style:font-name-complex="Calibri2"/>
    </style:style>
    <style:style style:name="T26" style:family="text">
      <style:text-properties style:font-name="Calibri" fo:letter-spacing="-0.0008in" fo:language="cs" fo:country="CZ" fo:font-weight="normal" style:font-name-asian="Calibri2" style:font-weight-asian="normal" style:font-name-complex="Calibri2" style:font-weight-complex="normal"/>
    </style:style>
    <style:style style:name="T27" style:family="text">
      <style:text-properties fo:font-weight="normal" style:font-weight-asian="normal" style:font-weight-complex="normal"/>
    </style:style>
    <style:style style:name="T28" style:family="text">
      <style:text-properties officeooo:rsid="0018619e"/>
    </style:style>
    <style:style style:name="T29" style:family="text">
      <style:text-properties officeooo:rsid="001b9c03"/>
    </style:style>
    <style:style style:name="T30" style:family="text">
      <style:text-properties officeooo:rsid="00199295"/>
    </style:style>
    <style:style style:name="T31" style:family="text">
      <style:text-properties officeooo:rsid="001ad27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ezpečnost a ochrana dat (BOD)</text:h>
      <text:p text:style-name="Standard"><text:span text:style-name="T1">Úvod do informační bezpečnosti</text:span>, <text:span text:style-name="T2">l</text:span><text:span text:style-name="T3">egislativa a normy</text:span><text:span text:style-name="T4">.</text:span> <text:span text:style-name="T1">Kryptografie. Proudové šifry, blokové šifry. Hashovací funkce a datová integrita. Symetrické šifrování. Asymetrické šifrovaní, výměna klíčů. Digitální podpisy, identifikace a autentizace entity.</text:span> <text:span text:style-name="T5">Certifikáty a certifikační autority</text:span>. <text:span text:style-name="T5">Komerční/kvalifikované certifikáty, časová razítka.</text:span> <text:span text:style-name="T1">Viry – historie a současnost.</text:span><text:span text:style-name="T6"> Antivirové programy. </text:span><text:span text:style-name="T1">Chyby v programech,</text:span><text:span text:style-name="T6"> revize kódu, testování bezpečnosti.</text:span></text:p>
      <text:p text:style-name="P2"><text:span text:style-name="T6"/></text:p>
      <text:p text:style-name="P3"><text:span text:style-name="T1">Zpracovano</text:span>, <text:span text:style-name="T5">castecne zpracovano - projit detailneji</text:span>, <text:span text:style-name="T6">nezpracovano</text:span></text:p>
      <text:p text:style-name="Standard"/>
      <text:h text:style-name="Heading_20_2" text:outline-level="2">Uvod:</text:h>
      <text:p text:style-name="P4"><text:span text:style-name="T7">Aktivum:</text:span><text:span text:style-name="T8"> Cokoliv, co má pro organizaci určitou hodnotu, od informací a dat přes hardware a software až po samotné uživatele a zaměstnance.</text:span></text:p>
      <text:p text:style-name="P4"><text:span text:style-name="T9">Důvěrnost (Confidentiality):</text:span> Zajištění stavu, kdy mají k informacím přístup pouze ty osoby a subjekty, které jsou k tomu výslovně oprávněny.</text:p>
      <text:p text:style-name="P4"><text:span text:style-name="T9">Integrita (Integrity):</text:span> Zabezpečení naprosté přesnosti, neporušenosti a kompletnosti informací i metod jejich zpracování.</text:p>
      <text:p text:style-name="P4"><text:span text:style-name="T9">Dostupnost (Availability):</text:span> Zaručení toho, že informace a systémy jsou uživatelům plně přístupné právě ve chvíli, kdy je potřebují.</text:p>
      <text:p text:style-name="P4"><text:span text:style-name="T9">Zranitelnost (Vulnerability):</text:span> Slabé místo informačního systému nebo aktiva (např. chyba v softwaru, lidský faktor), které může být zneužito k napáchání škody.</text:p>
      <text:p text:style-name="P4"><text:span text:style-name="T9">Hrozba (Threat):</text:span> Potenciální příčina bezpečnostního incidentu (může být úmyslná i neúmyslná), jež se snaží zranitelného místa využít k útoku.</text:p>
      <text:p text:style-name="P4"><text:span text:style-name="T9">Riziko (Risk):</text:span> Pravděpodobnost, s jakou daná hrozba skutečně využije zranitelnost a způsobí organizaci poškození nebo zničení aktiv.</text:p>
      <text:p text:style-name="P4"><text:span text:style-name="T9">Dopad (Impact):</text:span> Výsledek uplatněné hrozby, tedy reálná škoda nebo destrukce způsobená bezpečnostním incidentem.</text:p>
      <text:p text:style-name="P4"><text:span text:style-name="T9">Autentizace:</text:span> Bezpečnostní proces, při kterém se ověřuje pravost identity přistupujícího subjektu (např. uživatele) nebo objektu.</text:p>
      <text:p text:style-name="P4"><text:span text:style-name="T9">Autorizace:</text:span> Následný proces po autentizaci, který určuje, zda má daný subjekt oprávnění a důvěryhodnost k provedení konkrétní činnosti.</text:p>
      <text:p text:style-name="P4"><text:span text:style-name="T10">Analýza rizik (AR):</text:span><text:span text:style-name="T11"> Klíčový proces zjišťování, co se stane při nechránění informací, jak může být bezpečnost narušena a s jakou pravděpodobností, jehož cílem je snížit rizika na přijatelnou úroveň</text:span></text:p>
      <text:p text:style-name="P5"><text:span text:style-name="T8"/></text:p>
      <text:h text:style-name="Heading_20_3" text:outline-level="3"><text:span text:style-name="T12">D</text:span><text:span text:style-name="T13">ruhy bezpecnostnich politik:</text:span></text:h>
      <text:p text:style-name="P6"><text:span text:style-name="T14">promiskuitni</text:span> – vsechno povoleno</text:p>
      <text:p text:style-name="P6"><text:span text:style-name="T14">liberalni</text:span> – blacklist</text:p>
      <text:p text:style-name="P6"><text:span text:style-name="T14">racionalni</text:span> – whitelist </text:p>
      <text:p text:style-name="P6"><text:span text:style-name="T14">paranoidni</text:span> – vsechno zakazano i za cenu ztraty funkcnosti</text:p>
      <text:p text:style-name="P7"><text:span text:style-name="T13"/></text:p>
      <text:h text:style-name="Heading_20_3" text:outline-level="3"><text:soft-page-break/>ALE <text:span text:style-name="T15">(Annual Loss Expectancy)</text:span></text:h>
      <text:p text:style-name="P8">Ocekavana rocni ztrata. Pouziva se pro pro vypracovani kvantitativni analyzi rizik. ALE je cenovka, kterou nas riziko stoji rocne, kdyz ho nebudeme resit. Pokud je vyssi nez naklady na bezpecnostni opatreni, vyplati se je neignorovat a investovat do ochrany aktiv.</text:p>
      <text:h text:style-name="Heading_20_3" text:outline-level="3">Zalohy:</text:h>
      <text:list xml:id="list850960280" text:style-name="L1">
        <text:list-item>
          <text:p text:style-name="P9">Cold – <text:span text:style-name="T16">Zcela offline, data vetsinou na magnetickych paskach. Nasazeni není mozne bez predchozi pripravy.</text:span></text:p>
        </text:list-item>
        <text:list-item>
          <text:p text:style-name="P9">Cloud – <text:span text:style-name="T16">Data </text:span><text:span text:style-name="T15">zalohovana </text:span><text:span text:style-name="T16">jsou u treti strany.</text:span></text:p>
        </text:list-item>
        <text:list-item>
          <text:p text:style-name="P9">Warm – <text:span text:style-name="T15">Vytvari zalohy prubezne a je pouzit mene vykonny hw. K plne obnove muze dojit v prubehu nekolika dni.</text:span></text:p>
        </text:list-item>
        <text:list-item>
          <text:p text:style-name="P10"><text:span text:style-name="T17">Hot –</text:span><text:span text:style-name="T18"> kompletni kopie vcetne hardwaru. Mozne nasadit okamzite, bez prodlevy, uzivatel si nevsimne zmeny.</text:span></text:p>
        </text:list-item>
      </text:list>
      <text:h text:style-name="Heading_20_3" text:outline-level="3">Typy bezpecnostnich funkci:</text:h>
      <text:list text:continue-numbering="true" text:style-name="L1">
        <text:list-item>
          <text:p text:style-name="P11"><text:span text:style-name="T14">Administrativni</text:span>: Nemají technologickou ani fyzickou podobu, ale zaměřují se na řízení lidí, procesů a pravidel v organizaci. Bezpecnostni politiky, smernice, havarijni plany,...</text:p>
        </text:list-item>
        <text:list-item>
          <text:p text:style-name="P11"><text:span text:style-name="T14">Fyzicke</text:span>: Ucelem je znemoznit utocnikovy fyzicky pristup. Ploty, alarmy, bezpecnostni dvere, straze, kamery</text:p>
        </text:list-item>
        <text:list-item>
          <text:p text:style-name="P11"><text:span text:style-name="T19">Logicke</text:span><text:span text:style-name="T13">: Nastroje pro overeni identity. Autentizacni mechanismy, hesla, tokeny. Ochrana dat a systemu pomoci Firewallu, segmentace VLAN, IDS/IPS</text:span></text:p>
        </text:list-item>
      </text:list>
      <text:h text:style-name="Heading_20_2" text:outline-level="2"/>
      <text:h text:style-name="Heading_20_2" text:outline-level="2">Zajisteni duvernosti</text:h>
      <text:p text:style-name="P12">Duvernost (Confidentiality) je prvna pravidlo z CIA triady. Duvernost je zachovana, pokud pristup k informaci ma pouze zamyslena osoba. Pokud zpravu precte kdokoliv jiny, je duvernost porusena.</text:p>
      <text:h text:style-name="Heading_20_3" text:outline-level="3">Typy utajeni zprav</text:h>
      <text:p text:style-name="P13"><text:span text:style-name="T19">Steganografie</text:span><text:span text:style-name="T13"> – </text:span><text:span text:style-name="T20">existence zprávy je skryta</text:span></text:p>
      <text:p text:style-name="P13"><text:span text:style-name="T19">Kryptografie </text:span><text:span text:style-name="T13">– </text:span><text:span text:style-name="T20">zprava není skryta, ale je necitelna</text:span></text:p>
      <text:p text:style-name="P13"><text:span text:style-name="T20"/></text:p>
      <text:h text:style-name="Heading_20_3" text:outline-level="3">Kryptografie</text:h>
      <text:p text:style-name="P14">Vyznam zpravy je zmenen pomoci sifrovani. </text:p>
      <text:h text:style-name="Heading_20_4" text:outline-level="4">Typy sifrovani:</text:h>
      <text:list text:style-name="L2">
        <text:list-item>
          <text:p text:style-name="P15">Symetricke – pro sifrovani i desifrovani se pouziva stejny klic. Rychle, ale hrozi unik klice.</text:p>
        </text:list-item>
        <text:list-item>
          <text:p text:style-name="P15">Asymetrické – pouziva se koncept dvou klicu; verejny a soukromi. Je vypocetne narocnejsi nez symetricke sifrovani.<text:line-break/>RSA – Prvni sifra, ktera tento koncept uspesne pouzivala<text:line-break/>ECC – Kryptografie nad eliptickymi krivkami. Zajistuje stejnou bezpecnost jako RSA, ale s <text:soft-page-break/>mnohem kratsimi klici.<text:line-break/><text:span text:style-name="T21">EIGamal – sifrovana data jsou dvakrat delsi nez otevreny text</text:span></text:p>
        </text:list-item>
        <text:list-item>
          <text:p text:style-name="P15">Hybridni – Spojeni bezpecnosti z asym. a rychlosti symetrickych sifer. Zprava se zasifruje pomoci symetrickeho sifrovaciho algoritmu, klic se zasifruje pomoci rsa a prenese se k prijemci.</text:p>
        </text:list-item>
      </text:list>
      <text:p text:style-name="P16"/>
      <text:p text:style-name="P17">Druhy sifer:</text:p>
      <text:list text:style-name="L3">
        <text:list-item>
          <text:p text:style-name="P18">Substitucni: nahrazeni pismen za jine pismeno podle pravidel</text:p>
        </text:list-item>
        <text:list-item>
          <text:p text:style-name="P18">Transpozicni: prohozeni poradi pismen – presmycky: hra → rah</text:p>
        </text:list-item>
        <text:list-item>
          <text:p text:style-name="P18">Proudove sifry: Sifrovani zprav o predem nezname delce. Vytvori se nekonecny proud binarnich dat (klic), sifruje se XOR operaci bit po bitu. Priklad Vernamova sifra: neprolomitelna, klic je stejne dlouhy jako samotna zprava a je pouzit pouze jednou <text:span text:style-name="T22">(kvuli kryptoanalyze)</text:span>. Klic je dokonale nahodny.</text:p>
        </text:list-item>
        <text:list-item>
          <text:p text:style-name="P18">Blokove sifry: Zprava se rozdeli na bloky stejne delky, sifruje se vzdy cely blok. Zasifrovane bloky se pridavaji za sebe. Priklady AES, DES, TrippleDES</text:p>
        </text:list-item>
      </text:list>
      <text:h text:style-name="Heading_20_4" text:outline-level="4">Kershofuf princip v kryptografii</text:h>
      <text:p text:style-name="P19"><text:span text:style-name="T22">Bezpecnost sifry</text:span> <text:span text:style-name="T22">zavisi na utajeni klice, nikoliv na utajeni algoritmu</text:span></text:p>
      <text:p text:style-name="P20"><text:span text:style-name="T13"/></text:p>
      <text:h text:style-name="Heading_20_3" text:outline-level="3">Prikalady sifer</text:h>
      <text:p text:style-name="P21"><text:span text:style-name="T19">DES</text:span><text:span text:style-name="T13"> </text:span><text:span text:style-name="T23">(blokova)</text:span><text:span text:style-name="T13">– počet bitu v bloku </text:span><text:span text:style-name="T20">(56)</text:span><text:span text:style-name="T13">, komponenty, proc se uz nepouziva </text:span><text:span text:style-name="T20">(rychlost)</text:span><text:span text:style-name="T13">, </text:span><text:span text:style-name="T24">slabi klic </text:span><text:span text:style-name="T20">(generuje stejne bloky, sifra = otevreny text)</text:span></text:p>
      <text:p text:style-name="P21"><text:span text:style-name="T19">AES </text:span><text:span text:style-name="T23">(blokova)</text:span><text:span text:style-name="T13"> – </text:span><text:span text:style-name="T25">Advance Encryption Standart – dnes nejpouzivanejsi sifrovaci algoritmus. Pracuje s delky klicu 128, 192 a 256.</text:span></text:p>
      <text:p text:style-name="P22"><text:span text:style-name="T13">RC4 (Proudova) –</text:span><text:span text:style-name="T26"> pouzivala se ve WEP, zdrojovy kod pozdeji unikl. Dnes se uz nepouziva, protože generator klicu generoval slabe klice.</text:span></text:p>
      <text:p text:style-name="P23"><text:span text:style-name="T13">A5</text:span><text:span text:style-name="T26"> – Vyvynuta pro sifrovani GSM hovoru</text:span></text:p>
      <text:p text:style-name="P24">Odolnost proti nalezeni vzoru a druheho vzoru: co je vzor a druhy vzor</text:p>
      <text:p text:style-name="P25">Hledám zprávu jen na základě jejího hashe → hledám <text:span text:style-name="T9">vzor</text:span> (Preimage).<text:span text:style-name="T22">RC4</text:span></text:p>
      <text:list text:style-name="L4">
        <text:list-item>
          <text:p text:style-name="P26">Mám zprávu a hledám k ní jinou se stejným hashem → hledám <text:span text:style-name="T9">druhý vzor</text:span> (Second preimage).</text:p>
        </text:list-item>
        <text:list-item>
          <text:p text:style-name="P27">Hledám jakékoliv dvě náhodné zprávy, které budou mít stejný hash → hledám <text:span text:style-name="T9">kolizi</text:span> (Collision).</text:p>
        </text:list-item>
      </text:list>
      <text:h text:style-name="Heading_20_3" text:outline-level="3">Kvantova kryptografie</text:h>
      <text:p text:style-name="P28">Shoruv algoritmus z roku 1993 ukazal, ze kvantove pocitace by v principu mohlo prolomit RSA faktorizaci. Nektere vlady a entity proto aplikuji proces <text:span text:style-name="T14">Store now, decrypt later.</text:span><text:span text:style-name="T27"> Dnes zasifrovane zpravy shromazduji, i kdyz je nedokazi rozlustit. Az budou mit k dispozici kvantovy pocitac, mohou zpravy desifrovat. Nektera data zustavaji relevantni po desetileti, proto se vyplati pockat.</text:span></text:p>
      <text:h text:style-name="P29" text:outline-level="2" text:is-list-header="true"><text:soft-page-break/>Certifikaty</text:h>
      <text:p text:style-name="P30">Zajistuji integritu zprav. Odesilatel vytvori digitalni podpis. Svym privatnim klicem hash zpravy zasifruje vysledny retezec pripoji ke zprave. Prijemce potom pro desifrovani pouzije verejny klic odesilatele, vyjde mu hash zpravy. Z prijate zpravy potom sam vytvori hash a porovna, jestli jsou hashe stejne.</text:p>
      <text:h text:style-name="Heading_20_3" text:outline-level="3">Certifikacni autority</text:h>
      <text:p text:style-name="P28">CA je duveryhodna strana, ktera garantuje, ze pouzity certifikat skutecne patri tomu, kdo ho pouzil.</text:p>
      <text:p text:style-name="P28">Z ceskych je to napriklad PostSignum od Ceske posty.</text:p>
      <text:h text:style-name="P31" text:outline-level="2">Malware</text:h>
      <text:p text:style-name="P32"><text:span text:style-name="T14">Co je malware</text:span>: Skodlivy kod, ktery ma napachat na nakazenem systemu skody, ziskat informace, vydelat penize hackerovi bez vedomi majitele napadeneho stroje.</text:p>
      <text:p text:style-name="P32"><text:span text:style-name="T14">Cerv a vir</text:span> – Cerv se replikuje a snazi se nakazit co nejvice dostupnych zarizeni zcela samostatne, bez interakce s uzivatelem. Vir vyzaduje spusteni.</text:p>
      <text:p text:style-name="P33"><text:span text:style-name="T14">Trojsky kun </text:span>– Tvari se jako nejaky uzitecny program, ktery ma uzivatele primet k instalaci.</text:p>
      <text:p text:style-name="P32"><text:span text:style-name="T14">Rootkit a bootkit </text:span>– Rootkit je typ malwaru, ktery <text:span text:style-name="T28">skryva jine hrozby. Napada samotny operacni system, ktery je rootkitem ovlivnovat a napriklad muze udavat spatne informace. “Ne, tady zadny vir neni” – every rootkit ever. </text:span><text:span text:style-name="T29">Bootkit je typ malware, ktery spousti infikovany operacni system, napriklad z flasky, disku atd.</text:span></text:p>
      <text:p text:style-name="P32">Polymorfni viry – <text:span text:style-name="T28">Antiviry drive malware vyhledavali pomoci znalostni baze hashu skodliveho kodu. Polymorfni vir pri kazde infekci mirne zmeni svuj kod a tim padem je hash pokazde jiny a nepredvidatelny. Antiviry proto presli na detekci pomoci heuristiky – uvazuji, co je podezrele chovani a pocitaji pravdepodobnost, ze se jedna o malware. Napriklad, jestli program chce mazat nebo vytvaret soubory, pravdepodobnost se zvysi.</text:span></text:p>
      <text:p text:style-name="P32">Antiviry – <text:span text:style-name="T28">Programy urcene pro vyhledani, karantenu nebo odstraneni malware.</text:span></text:p>
      <text:p text:style-name="P32">Ma<text:span text:style-name="T28">k</text:span>roviry a scripty – <text:span text:style-name="T28">Macrovirus se siril pomoci MS Word s macry.</text:span></text:p>
      <text:p text:style-name="P32">Stealth viry – <text:span text:style-name="T30">Maskovany virus. </text:span><text:span text:style-name="T31">Pomoci ruznych technik skryva svoji existenci nebo aktivitu. Muze sledovat systemove procesy, falsovat udaje, sledovat systemova volani a delegovat je na vlastni kod. Muze zastavit svoji aktivitu, kdyz je aktivni task manager, aby nebylo videt, ze cpu je na 100% vytizeni z duvodu tezby btc atd. Maskuje delku souboru, pokrocilejsi viry maskuji i svuj obsah napriklad pomoci:</text:span></text:p>
      <text:list text:style-name="L5">
        <text:list-item>
          <text:p text:style-name="P34">obfuskace – kod se snane neprehledny a znesnadnuje analyzu</text:p>
        </text:list-item>
        <text:list-item>
          <text:p text:style-name="P34">kodovani nebo sifrovani – oboji je nutne prevest do spustitelneho kodu pred spustenim</text:p>
        </text:list-item>
        <text:list-item>
          <text:p text:style-name="P34">mrtvy kod – kod, ktery nedela vubec nic. Znesnadnuje analyzu</text:p>
        </text:list-item>
        <text:list-item>
          <text:p text:style-name="P34">rozdeleni na role – loader, downloader, …</text:p>
        </text:list-item>
      </text:list>
      <text:h text:style-name="Heading_20_3" text:outline-level="3"><text:soft-page-break/>Historie</text:h>
      <text:p text:style-name="P35">Brain (1996), Stuxnet, Morris worm, I love you. Frodo</text:p>
      <text:h text:style-name="Heading_20_2" text:outline-level="2">Chyby v programech</text:h>
      <text:p text:style-name="P35">Buffer overflow – Jde o anomálii, kdy proces uloží data do části paměti, která pro to nebyla programátorem vyhrazena.</text:p>
      <text:list text:style-name="L6">
        <text:list-item>
          <text:p text:style-name="P36">Stack overflow: utok na zasobnik, prepsani navratovou adresu funkce, procesor skoci na vlastni skodlivy kod</text:p>
        </text:list-item>
        <text:list-item>
          <text:p text:style-name="P36">heap overflow: utok na haldu (dynamicky alokovana pamet).</text:p>
        </text:list-item>
      </text:list>
      <text:p text:style-name="P35">Code/command injection – <text:span text:style-name="T29">Vznika po nedostatecne sanitaci vstupnich poli. Utocnik se snazi pres vstupni pole vpasovat data, ktera program chape jako instrukce. SQL injection, xss, code injection.</text:span></text:p>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3T21:52:15.282383233</meta:creation-date>
    <dc:date>2026-05-19T23:28:24.656603186</dc:date>
    <meta:editing-duration>PT45M5S</meta:editing-duration>
    <meta:editing-cycles>4</meta:editing-cycles>
    <meta:generator>LibreOffice/26.2.3.2$Linux_X86_64 LibreOffice_project/d4d5ed47b6084125f28d269a5650105d54dde034</meta:generator>
    <meta:document-statistic meta:table-count="0" meta:image-count="0" meta:object-count="0" meta:page-count="5" meta:paragraph-count="85" meta:word-count="1316" meta:character-count="9237" meta:non-whitespace-character-count="7989"/>
  </office:meta>
</office:document-meta>
</file>