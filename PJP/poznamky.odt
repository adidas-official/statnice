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style:writing-mode="lr-tb" style:writing-mode-automatic="false"/>
      <style:text-properties officeooo:rsid="000ac193" officeooo:paragraph-rsid="000ac193"/>
    </style:style>
    <style:style style:name="P2" style:family="paragraph" style:parent-style-name="Text_20_body">
      <style:paragraph-properties style:writing-mode="lr-tb" style:writing-mode-automatic="false"/>
      <style:text-properties fo:color="#c0c0c0" loext:opacity="100%" officeooo:rsid="000ac193" officeooo:paragraph-rsid="000ac193"/>
    </style:style>
    <style:style style:name="P3" style:family="paragraph" style:parent-style-name="Text_20_body">
      <style:paragraph-properties style:writing-mode="lr-tb" style:writing-mode-automatic="false"/>
      <style:text-properties officeooo:rsid="001073b6" officeooo:paragraph-rsid="001073b6"/>
    </style:style>
    <style:style style:name="P4" style:family="paragraph" style:parent-style-name="Text_20_body">
      <style:paragraph-properties style:writing-mode="lr-tb" style:writing-mode-automatic="false"/>
      <style:text-properties officeooo:rsid="000ac193" officeooo:paragraph-rsid="001073b6"/>
    </style:style>
    <style:style style:name="P5" style:family="paragraph" style:parent-style-name="Text_20_body">
      <style:text-properties officeooo:rsid="001073b6" officeooo:paragraph-rsid="001073b6"/>
    </style:style>
    <style:style style:name="P6" style:family="paragraph" style:parent-style-name="Text_20_body">
      <style:text-properties officeooo:rsid="000c0688" officeooo:paragraph-rsid="000c0688"/>
    </style:style>
    <style:style style:name="P7" style:family="paragraph" style:parent-style-name="Text_20_body">
      <style:text-properties officeooo:rsid="000c931e" officeooo:paragraph-rsid="000c931e"/>
    </style:style>
    <style:style style:name="P8" style:family="paragraph" style:parent-style-name="Text_20_body">
      <style:text-properties fo:color="#c0c0c0" loext:opacity="100%" officeooo:rsid="000ac193" officeooo:paragraph-rsid="000ac193"/>
    </style:style>
    <style:style style:name="P9" style:family="paragraph" style:parent-style-name="Text_20_body">
      <style:paragraph-properties style:writing-mode="lr-tb" style:writing-mode-automatic="false"/>
      <style:text-properties officeooo:rsid="001081bf" officeooo:paragraph-rsid="001081bf"/>
    </style:style>
    <style:style style:name="P10" style:family="paragraph" style:parent-style-name="Text_20_body">
      <style:paragraph-properties style:writing-mode="lr-tb" style:writing-mode-automatic="false"/>
      <style:text-properties officeooo:rsid="000c931e" officeooo:paragraph-rsid="000c931e"/>
    </style:style>
    <style:style style:name="P11" style:family="paragraph" style:parent-style-name="Heading_20_2">
      <style:paragraph-properties style:writing-mode="lr-tb" style:writing-mode-automatic="false"/>
    </style:style>
    <style:style style:name="P12" style:family="paragraph" style:parent-style-name="Text_20_body">
      <style:text-properties officeooo:rsid="00123a36" officeooo:paragraph-rsid="00123a36"/>
    </style:style>
    <style:style style:name="P13" style:family="paragraph" style:parent-style-name="Text_20_body">
      <style:text-properties officeooo:rsid="000e36f8" officeooo:paragraph-rsid="000e36f8"/>
    </style:style>
    <style:style style:name="P14" style:family="paragraph" style:parent-style-name="Text_20_body">
      <style:paragraph-properties style:writing-mode="lr-tb" style:writing-mode-automatic="false"/>
      <style:text-properties officeooo:rsid="00123a36" officeooo:paragraph-rsid="00123a36"/>
    </style:style>
    <style:style style:name="P15" style:family="paragraph" style:parent-style-name="Text_20_body">
      <style:paragraph-properties style:writing-mode="lr-tb" style:writing-mode-automatic="false"/>
      <style:text-properties officeooo:rsid="000eb46b" officeooo:paragraph-rsid="000eb46b"/>
    </style:style>
    <style:style style:name="P16" style:family="paragraph" style:parent-style-name="Text_20_body">
      <style:text-properties officeooo:rsid="000eb46b" officeooo:paragraph-rsid="000eb46b"/>
    </style:style>
    <style:style style:name="T1" style:family="text">
      <style:text-properties officeooo:rsid="000c0688"/>
    </style:style>
    <style:style style:name="T2" style:family="text">
      <style:text-properties officeooo:rsid="000c931e"/>
    </style:style>
    <style:style style:name="T3" style:family="text">
      <style:text-properties officeooo:rsid="000eb4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ovaci jazyky a prekladace</text:h>
      <text:h text:style-name="P1" text:outline-level="2">Automatizace s Makefile</text:h>
      <text:p text:style-name="P2">Co je Makefile? Co je cilem? Jake ma vyhody? Jak se spousti? Cim zacina prikaz?</text:p>
      <text:p text:style-name="P3">Hlava:</text:p>
      <text:p text:style-name="P4">Makefile je soubor, který obsahuje instrukce pro kompilaci zdrojoveho kodu z vyssiho jazyka do nizsiho. Vysledkem kompilace je spustitelny soubor (v pripade proceduralnich jazyku) nebo se kod preklada za behu programu (interpretovane jazyky). V Makefile jsou uvedeny zavislosti, které musí pro kompilaci byt k dispozici (soubory se zdrojovym kodem, hlavickove soubory, …) <text:span text:style-name="T1">a poradi v jakem se k temto zdrojum pristupuje. Makefile sleduje, jake kroky uz byly dokonceny a když se spusti znovu kompilace, nemusi se znovu vytvaret soubory, které se nemenily. Kazdy prikaz musí zacinat tabulatorem [TAB]</text:span></text:p>
      <text:p text:style-name="P3">AI:</text:p>
      <text:p text:style-name="P3">Makefile je scriptovy soubor s instrukcemi pro kompilaci. Spousti se utilitou make. SW projekt sklada na zaklade grafu zavislosti a casovych relaci mei uzly. Cilem je spustitelny soubor, objektovy soubor nebo nejaka operace, například smazani nepotrebnych souboru pomoci cile clean.</text:p>
      <text:p text:style-name="P3">Cil se provede, pokud vystupni soubor neexistuje nebo souvisejici soubor je mladse nez existujici vystup. </text:p>
      <text:h text:style-name="Heading_20_2" text:outline-level="2">Lexikalni analyza</text:h>
      <text:p text:style-name="P2">Co je lexikalni analyza? Co dela? Co z neho vyleze? Struktura lex souboru.</text:p>
      <text:p text:style-name="P5">Hlava:</text:p>
      <text:p text:style-name="P6">Lexikalni analyza pomoci regularnich vyrazu prevadi lexy (jednotlive znaky nebo pismena) na tokeny – gramaticke prvky daneho jazyka. Jsou to vlastne slova nejake gramatiky, sekvence znaku, které davaji v jazyce smysl. Lexikalni analyzator prochazi proud dat znak po znaku a jakmile zaznamena shodu po vzoru regex, zaznamena si token. Lexikalni analyzator vytvari lex.yy soubor, <text:span text:style-name="T2">který se nasledne pouzije v další fazi kompilace – </text:span><text:span text:style-name="T3">syntakticke</text:span><text:span text:style-name="T2"> analyz</text:span><text:span text:style-name="T3">y.</text:span></text:p>
      <text:p text:style-name="P7">V lex souboru je nahore hlavicka, kde jsou například deklarovane promenne, mezi znaky</text:p>
      <text:p text:style-name="P7">```lex<text:line-break/>%%<text:line-break/>…<text:line-break/>%%<text:line-break/>```</text:p>
      <text:p text:style-name="P7">a potom nasleduje seznam regularnich vyrazu.</text:p>
      <text:p text:style-name="P5">AI:</text:p>
      <text:p text:style-name="P3">Lexikální analýza prochází zdrojový kód znak po znaku a sdružuje je do smysluplných posloupností zvaných lexémy. Tyto lexémy rozpoznává na základě abstraktních vzorů (předpisů tvořených regulárními výrazy).</text:p>
      <text:p text:style-name="P3"><text:soft-page-break/>Výstupem lexikálního analyzátoru (skeneru) je proud tokenů (gramatických entit odpovídajících lexémům), který si přebírá další fáze – syntaktický analyzátor. Konkrétní hodnoty tokenů se také ukládají do tabulky symbolů. (Pozor na chybu: Lexikální analyzátor nevytváří soubor lex.yy.c. Tento zdrojový soubor v jazyce C vytváří generátor lex na základě tvého definičního .l souboru před samotnou kompilací).</text:p>
      <text:p text:style-name="P3">Struktura lex souboru: Soubor (obvykle s příponou .l) je rozdělen do 3 částí pomocí značek %%:</text:p>
      <text:p text:style-name="P3">Definice a deklarace: Zde je blok C kódů (např. #include hlavičky nebo proměnné) uzavřený mezi %{ a %} a definice regulárních výrazů.</text:p>
      <text:p text:style-name="P3">%%</text:p>
      <text:p text:style-name="P3">Pravidla a akce (povinná část): Seznam regulárních výrazů (vzorů) a k nim přiřazených akcí v jazyce C, které se při shodě vykonají.</text:p>
      <text:p text:style-name="P3">%%</text:p>
      <text:p text:style-name="P3">Uživatelský C kód: Dodatečné C procedury, nejčastěji funkce main() s voláním rutiny yylex().</text:p>
      <text:h text:style-name="Heading_20_2" text:outline-level="2">Konflikty</text:h>
      <text:p text:style-name="P8">Jak se resi shody? Co jsou stavy a proc se pouzivaji?</text:p>
      <text:p text:style-name="P9">Hlava:</text:p>
      <text:p text:style-name="P10">Z duvodu mnohoznacnosti vyrazu muze dojit ke konfliktu během lexikalni analyzy. Lexikalni analyzator se snazi najit co nejdelsi shodu podle vzoru regularniho vyrazu a tu preferuje. Programator muze urcit prioritu pro regularni vyrazy a potom se tokeny budou tvorit podle pravidel. Nebo se pouzivaji stavy. V hlavicce se definuje, co je zacatek stavu – například prijde poslounost znaku `/*` a program se prepne do stavu START_COMMENT a do jineho stavu se nevrati driv, nez narazi na znaky `*/`. Stavy definuji nova pravidla, která plati jen za danych podminek.</text:p>
      <text:p text:style-name="P9">AI:</text:p>
      <text:p text:style-name="P9">Během lexikální analýzy může aktuálnímu vstupu vyhovovat více vzorů (konflikt). lex to řeší dvěma pravidly: 1. Vždy preferuje nejdelší možnou shodu (např. načte ifthen jako jeden identifikátor, nikoliv jako klíčové slovo if). 2. Při shodách stejné délky vyhrává to pravidlo, které je v lex souboru uvedeno dříve (např. klíčové slovo if musí být definováno před obecným identifikátorem).</text:p>
      <text:p text:style-name="P9">Stavy se používají pro zpracování složitějších nebo víceřádkových struktur, pro které nedostačuje jednoduchý regulární výraz (např. blokové komentáře /* ... */ nebo textové řetězce v C). Stav se deklaruje v hlavičce (např. %x comment) a přepíná se do něj akcí BEGIN(comment) při nalezení počátečního znaku. Uvnitř stavu pak platí jen specifická pravidla (např. ignorování všeho kromě */), dokud se analyzátor nevrátí do výchozího stavu příkazem BEGIN(INITIAL)</text:p>
      <text:h text:style-name="P11" text:outline-level="2">Regularni vyrazy</text:h>
      <text:p text:style-name="P8">Co je regularni vyraz? K cemu slouzi? Priklady. Zakladni stavebni prvky.</text:p>
      <text:p text:style-name="P12">Hlava:</text:p>
      <text:p text:style-name="P13"><text:soft-page-break/>Regularni vyraz je vzor pro detekci posloupnosti znaku. Vzor se muze skladat z konkretnich prvku („abc“) , skupin prvku (cislice [0-9], velka pismena [A-Z], ...), kvantifikatoru (* - 0x nebo vicekrat, ? – nulakrat nebo jednou, + - jednou nebo vicekrat). Napriklad regex pro email by se dal definovat jako ([a-z][a-z0-9\-\+_]+)<text:span text:style-name="T3">+</text:span>@[a-z0-9\-\+\._]<text:span text:style-name="T3">{2,}</text:span>\.[a-z]<text:span text:style-name="T3">{2,3}</text:span></text:p>
      <text:p text:style-name="P12">AI:</text:p>
      <text:p text:style-name="P12">Regulární výraz (RE) slouží k formální reprezentaci regulárních jazyků. V překladačích funguje jako abstraktní vzor (pattern), pomocí kterého lexikální analyzátor detekuje ve zdrojovém kódu platná slova (lexémy) a mění je na tokeny.</text:p>
      <text:p text:style-name="P12">Mezi základní formální prvky RE patří: jeden znak (nebo prázdný řetězec ϵ), zřetězení (sekvence znaků ab), sjednocení (operátor | pro alternativy), a kvantifikátory (uzávěr * pro 0 a více výskytů, nenulový výčet + pro 1 a více, ? pro 0 nebo 1). Dále se používají kulaté závorky pro () shlukování do skupin, hranaté závorky [] pro výčty a rozsahy, a kotvy ^ a $.</text:p>
      <text:p text:style-name="P12">Příklady z tvorby překladačů: Definice pro bílé (prázdné) znaky [ \t\n]+ nebo obecný alfanumerický identifikátor [A-Za-z0-9]+.</text:p>
      <text:h text:style-name="Heading_20_2" text:outline-level="2">Konecne automaty</text:h>
      <text:p text:style-name="P8">Co je konecny automat? Rozdil mezi deterministickym a nedeterministickym KA? Kroky.</text:p>
      <text:p text:style-name="P14">Hlava:</text:p>
      <text:p text:style-name="P15">Konecny automat je program, který prechazi z jednoho stavu do druheho, dokud nedojde to ukoncujiciho stavu. Pomoci logickych podminek se „rozhoduje“, který stav bude nasledujici. Automaty mohou byt deterministicke – v kazdem kroku jsme schopni zjistit, do jakeho stavu se za dane podminky dostane, nebo nedeterministicke – do stejneho stavu vede vice moznosti.</text:p>
      <text:p text:style-name="P16">Program zacne v nejakem stavu S0 a prijde token. Stroj podle podminek vyhodnoti, do ktereho stavu se prepne. Kdyz je ve stavu S1 a prijde token „+“, prejde do stavu S2, pokud by prisel token „[„, presel by do stavu S7, například.</text:p>
      <text:p text:style-name="P12">AI:</text:p>
      <text:p text:style-name="P12">Konečný automat (KA) je teoretický matematický model (v překladačích slouží k realizaci lexikální analýzy), který je formálně definován pěticí: konečnou množinou stavů, vstupní abecedou, přechodovou funkcí, počátečním stavem a množinou koncových (akceptujících) stavů. Místo „logických podmínek“ se řídí přechodovou funkcí, která na základě aktuálního stavu a přečteného symbolu určí další stav. Rozdíl: U deterministického (DKA) existuje pro každý stav a čtený symbol vždy právě jeden jednoznačný přechod dál. U nedeterministického (NKA) může pro stejný symbol existovat z jednoho stavu více různých přechodů naráz, případně automat může měnit stavy bez přečtení jakéhokoli znaku ze vstupu (ϵ-přechody). (V praxi se NKA pro potřeby překladače transformují na DKA a následně minimalizují). Kroky: Automat začíná v počátečním stavu (např. q0) a z datového proudu čte postupně jednotlivé znaky (nikoliv tokeny). Na základě těchto znaků mění svůj aktuální stav. Jakmile úspěšně přečte posloupnost znaků (lexém) a skončí v některém z koncových (akceptujících) stavů, úspěšně rozpoznal slovo a na výstupu vygeneruje tok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21:18:34.890468690</meta:creation-date>
    <dc:date>2026-05-21T23:32:37.140449892</dc:date>
    <meta:editing-duration>PT12M12S</meta:editing-duration>
    <meta:editing-cycles>2</meta:editing-cycles>
    <meta:generator>LibreOffice/26.2.3.2$Linux_X86_64 LibreOffice_project/d4d5ed47b6084125f28d269a5650105d54dde034</meta:generator>
    <meta:document-statistic meta:table-count="0" meta:image-count="0" meta:object-count="0" meta:page-count="3" meta:paragraph-count="46" meta:word-count="1091" meta:character-count="7353" meta:non-whitespace-character-count="6300"/>
  </office:meta>
</office:document-meta>
</file>